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Playyy</text:p>
          </table:table-cell>
          <table:table-cell office:value-type="string">
            <text:p>Playyy (https://playyy.ai/) génère et édite des visuels par instruction sur un tableau blanc entièrement modifiable.</text:p>
          </table:table-cell>
          <table:table-cell office:value-type="string">
            <text:p>https://www.uneiaparjour.fr/playyy/</text:p>
          </table:table-cell>
          <table:table-cell office:value-type="string">
            <text:p>chatbot</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texte</text:p>
          </table:table-cell>
          <table:table-cell office:value-type="string">
            <text:p/>
          </table:table-cell>
          <table:table-cell office:value-type="string">
            <text:p>22/07/2026</text:p>
          </table:table-cell>
        </table:table-row>
        <table:table-row>
          <table:table-cell office:value-type="string">
            <text:p>Longscribe</text:p>
          </table:table-cell>
          <table:table-cell office:value-type="string">
            <text:p>Longscribe (https://longscribe.com) transcrit des vidéos et enregistrements longs (YouTube, Vimeo, TikTok, Instagram, Facebook, Twitch, X, Dailymotion, SoundCloud ou des fichiers audio/vidéo importés).</text:p>
          </table:table-cell>
          <table:table-cell office:value-type="string">
            <text:p>https://www.uneiaparjour.fr/longscribe/</text:p>
          </table:table-cell>
          <table:table-cell office:value-type="string">
            <text:p>Non classé</text:p>
          </table:table-cell>
          <table:table-cell office:value-type="string">
            <text:p>sans compte</text:p>
          </table:table-cell>
          <table:table-cell office:value-type="string">
            <text:p>texte</text:p>
          </table:table-cell>
          <table:table-cell office:value-type="string">
            <text:p>vidéo</text:p>
          </table:table-cell>
          <table:table-cell office:value-type="string">
            <text:p>voix</text:p>
          </table:table-cell>
          <table:table-cell office:value-type="string">
            <text:p>youtube</text:p>
          </table:table-cell>
          <table:table-cell office:value-type="string">
            <text:p>20/07/2026</text:p>
          </table:table-cell>
        </table:table-row>
        <table:table-row>
          <table:table-cell office:value-type="string">
            <text:p>Deck</text:p>
          </table:table-cell>
          <table:table-cell office:value-type="string">
            <text:p>Deck (https://www.hellodeck.ai/) est un assistant IA joignable par une adresse e-mail dédiée, capable d’automatiser des tâches, de suivre des fils de discussion et d’organiser le travail par projets.</text:p>
          </table:table-cell>
          <table:table-cell office:value-type="string">
            <text:p>https://www.uneiaparjour.fr/deck/</text:p>
          </table:table-cell>
          <table:table-cell office:value-type="string">
            <text:p>automatisation</text:p>
          </table:table-cell>
          <table:table-cell office:value-type="string">
            <text:p>chatbot</text:p>
          </table:table-cell>
          <table:table-cell office:value-type="string">
            <text:p>documents</text:p>
          </table:table-cell>
          <table:table-cell office:value-type="string">
            <text:p/>
          </table:table-cell>
          <table:table-cell office:value-type="string">
            <text:p/>
          </table:table-cell>
          <table:table-cell office:value-type="string">
            <text:p/>
          </table:table-cell>
          <table:table-cell office:value-type="string">
            <text:p>21/07/2026</text:p>
          </table:table-cell>
        </table:table-row>
        <table:table-row>
          <table:table-cell office:value-type="string">
            <text:p>Aye</text:p>
          </table:table-cell>
          <table:table-cell office:value-type="string">
            <text:p>Aye (https://okaapps.com/product/6760281977) est un navigateur web basé sur Chromium avec assistant IA intégré, capable d’analyser une page et de planifier et exécuter des actions.</text:p>
          </table:table-cell>
          <table:table-cell office:value-type="string">
            <text:p>https://www.uneiaparjour.fr/aye/</text:p>
          </table:table-cell>
          <table:table-cell office:value-type="string">
            <text:p>automatisation</text:p>
          </table:table-cell>
          <table:table-cell office:value-type="string">
            <text:p>chatbot</text:p>
          </table:table-cell>
          <table:table-cell office:value-type="string">
            <text:p>navigateur</text:p>
          </table:table-cell>
          <table:table-cell office:value-type="string">
            <text:p>sans compte</text:p>
          </table:table-cell>
          <table:table-cell office:value-type="string">
            <text:p>usage illimité</text:p>
          </table:table-cell>
          <table:table-cell office:value-type="string">
            <text:p/>
          </table:table-cell>
          <table:table-cell office:value-type="string">
            <text:p>19/07/2026</text:p>
          </table:table-cell>
        </table:table-row>
        <table:table-row>
          <table:table-cell office:value-type="string">
            <text:p>MixTranslate</text:p>
          </table:table-cell>
          <table:table-cell office:value-type="string">
            <text:p>MixTranslate (https://mixtranslate.com/) envoie une même instruction de traduction à des modèles de langage en parallèle et sélectionne automatiquement le résultat le plus adapté au ton et au contexte.</text:p>
          </table:table-cell>
          <table:table-cell office:value-type="string">
            <text:p>https://www.uneiaparjour.fr/mixtranslat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7/2026</text:p>
          </table:table-cell>
        </table:table-row>
        <table:table-row>
          <table:table-cell office:value-type="string">
            <text:p>Moodboard Creator</text:p>
          </table:table-cell>
          <table:table-cell office:value-type="string">
            <text:p>Moodboard Creator (https://www.moodboardcreator.dev) génère un tableau d’inspirations à partir d’une courte description.</text:p>
          </table:table-cell>
          <table:table-cell office:value-type="string">
            <text:p>https://www.uneiaparjour.fr/moodboard-creator/</text:p>
          </table:table-cell>
          <table:table-cell office:value-type="string">
            <text:p>présentation</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17/07/2026</text:p>
          </table:table-cell>
        </table:table-row>
        <table:table-row>
          <table:table-cell office:value-type="string">
            <text:p>MemeCam</text:p>
          </table:table-cell>
          <table:table-cell office:value-type="string">
            <text:p>MemeCam (https://www.memecam.io) génère un mème à partir d’une photo importée ou prise via la caméra.</text:p>
          </table:table-cell>
          <table:table-cell office:value-type="string">
            <text:p>https://www.uneiaparjour.fr/memecam/</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7/2026</text:p>
          </table:table-cell>
        </table:table-row>
        <table:table-row>
          <table:table-cell office:value-type="string">
            <text:p>Fenzo</text:p>
          </table:table-cell>
          <table:table-cell office:value-type="string">
            <text:p>Fenzo (https://fenzo.ai/) génère un cours interactif structuré à partir d’une instruction ou de documents importés.</text:p>
          </table:table-cell>
          <table:table-cell office:value-type="string">
            <text:p>https://www.uneiaparjour.fr/fenzo/</text:p>
          </table:table-cell>
          <table:table-cell office:value-type="string">
            <text:p>éduc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7/2026</text:p>
          </table:table-cell>
        </table:table-row>
        <table:table-row>
          <table:table-cell office:value-type="string">
            <text:p>Convly Image-to-Prompt Generator</text:p>
          </table:table-cell>
          <table:table-cell office:value-type="string">
            <text:p>Convly Image-to-Prompt Generator (https://convly.ai/image-to-prompt/) génère une instruction à partir d’une image importée.</text:p>
          </table:table-cell>
          <table:table-cell office:value-type="string">
            <text:p>https://www.uneiaparjour.fr/convly-image-to-prompt-generator/</text:p>
          </table:table-cell>
          <table:table-cell office:value-type="string">
            <text:p>imag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14/07/2026</text:p>
          </table:table-cell>
        </table:table-row>
        <table:table-row>
          <table:table-cell office:value-type="string">
            <text:p>Vidmud AI Photo Editor</text:p>
          </table:table-cell>
          <table:table-cell office:value-type="string">
            <text:p>Vidmud AI Photo Editor (https://www.vidmud.com/ai-photo-editor-online.html) modifie une photo à partir d’une instruction textuelle.</text:p>
          </table:table-cell>
          <table:table-cell office:value-type="string">
            <text:p>https://www.uneiaparjour.fr/vidmud-ai-photo-editor/</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13/07/2026</text:p>
          </table:table-cell>
        </table:table-row>
        <table:table-row>
          <table:table-cell office:value-type="string">
            <text:p>Video Transcription AI</text:p>
          </table:table-cell>
          <table:table-cell office:value-type="string">
            <text:p>Video Transcription AI (https://videotranscription.ai/) transcrit automatiquement des vidéos Youtube, Tiktok ou Instagram, des fichiers vidéos, audios ou texte avec résumé, chatbot et carte mentale.</text:p>
          </table:table-cell>
          <table:table-cell office:value-type="string">
            <text:p>https://www.uneiaparjour.fr/video-transcription-ai/</text:p>
          </table:table-cell>
          <table:table-cell office:value-type="string">
            <text:p>chatbot</text:p>
          </table:table-cell>
          <table:table-cell office:value-type="string">
            <text:p>documents</text:p>
          </table:table-cell>
          <table:table-cell office:value-type="string">
            <text:p>mindmap</text:p>
          </table:table-cell>
          <table:table-cell office:value-type="string">
            <text:p>sans compte</text:p>
          </table:table-cell>
          <table:table-cell office:value-type="string">
            <text:p>usage illimité</text:p>
          </table:table-cell>
          <table:table-cell office:value-type="string">
            <text:p>youtube</text:p>
          </table:table-cell>
          <table:table-cell office:value-type="string">
            <text:p>12/07/2026</text:p>
          </table:table-cell>
        </table:table-row>
        <table:table-row>
          <table:table-cell office:value-type="string">
            <text:p>Image to 3D AI</text:p>
          </table:table-cell>
          <table:table-cell office:value-type="string">
            <text:p>Image to 3D AI (https://image-to-3d.ai/) génère des modèles 3D à partir d’une image ou d’une instruction texte.</text:p>
          </table:table-cell>
          <table:table-cell office:value-type="string">
            <text:p>https://www.uneiaparjour.fr/image-to-3d-ai/</text:p>
          </table:table-cell>
          <table:table-cell office:value-type="string">
            <text:p>images 3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7/2026</text:p>
          </table:table-cell>
        </table:table-row>
        <table:table-row>
          <table:table-cell office:value-type="string">
            <text:p>Kyutai Pocket TTS</text:p>
          </table:table-cell>
          <table:table-cell office:value-type="string">
            <text:p>Kyutai Pocket TTS (https://kyutai.org/tts/ — documentation : https://github.com/kyutai-labs/pocket-tts) est un modèle open source de synthèse vocale.</text:p>
          </table:table-cell>
          <table:table-cell office:value-type="string">
            <text:p>https://www.uneiaparjour.fr/kyutai-pocket-t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0/07/2026</text:p>
          </table:table-cell>
        </table:table-row>
        <table:table-row>
          <table:table-cell office:value-type="string">
            <text:p>Assistant IA ÊtrePROF</text:p>
          </table:table-cell>
          <table:table-cell office:value-type="string">
            <text:p>L’Assistant IA ÊtrePROF (https://nouvel.etreprof.fr/preparer-seance-sequence) génère des des séances pédagogiques et une fiche professeur à partir d’une instruction rédigée sous forme d’informations choisies qui décrivent la séance, le niveau, la discipline et le profil de la classe (couvre la petite section à la terminale.)</text:p>
          </table:table-cell>
          <table:table-cell office:value-type="string">
            <text:p>https://www.uneiaparjour.fr/assistant-ia-etreprof/</text:p>
          </table:table-cell>
          <table:table-cell office:value-type="string">
            <text:p>éducation</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8/07/2026</text:p>
          </table:table-cell>
        </table:table-row>
        <table:table-row>
          <table:table-cell office:value-type="string">
            <text:p>Muse Image</text:p>
          </table:table-cell>
          <table:table-cell office:value-type="string">
            <text:p>Muse Image (https://www.meta.ai) génère et modifie des images à partir d’instructions en langage naturel, avec fusion de plusieurs photos et rendu de texte lisible dans l’image.</text:p>
          </table:table-cell>
          <table:table-cell office:value-type="string">
            <text:p>https://www.uneiaparjour.fr/muse-image/</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7/2026</text:p>
          </table:table-cell>
        </table:table-row>
        <table:table-row>
          <table:table-cell office:value-type="string">
            <text:p>ChecklistFox</text:p>
          </table:table-cell>
          <table:table-cell office:value-type="string">
            <text:p>ChecklistFox (https://checklistfox.com/) génère des checklists personnalisées à partir d’une instruction ou de modèles, exportables en PDF.</text:p>
          </table:table-cell>
          <table:table-cell office:value-type="string">
            <text:p>https://www.uneiaparjour.fr/checklistfox/</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7/2026</text:p>
          </table:table-cell>
        </table:table-row>
        <table:table-row>
          <table:table-cell office:value-type="string">
            <text:p>Bubul</text:p>
          </table:table-cell>
          <table:table-cell office:value-type="string">
            <text:p>Bubul (https://bubul.app/) propose huit outils IA destinés aux enseignants et formateurs :</text:p>
          </table:table-cell>
          <table:table-cell office:value-type="string">
            <text:p>https://www.uneiaparjour.fr/bubul/</text:p>
          </table:table-cell>
          <table:table-cell office:value-type="string">
            <text:p>éducation</text:p>
          </table:table-cell>
          <table:table-cell office:value-type="string">
            <text:p>FR / EU</text:p>
          </table:table-cell>
          <table:table-cell office:value-type="string">
            <text:p>images</text:p>
          </table:table-cell>
          <table:table-cell office:value-type="string">
            <text:p>présentation</text:p>
          </table:table-cell>
          <table:table-cell office:value-type="string">
            <text:p/>
          </table:table-cell>
          <table:table-cell office:value-type="string">
            <text:p/>
          </table:table-cell>
          <table:table-cell office:value-type="string">
            <text:p>06/07/2026</text:p>
          </table:table-cell>
        </table:table-row>
        <table:table-row>
          <table:table-cell office:value-type="string">
            <text:p>Briefed</text:p>
          </table:table-cell>
          <table:table-cell office:value-type="string">
            <text:p>Briefed (https://briefednewsletter.com/) génère une newsletter personnalisée par IA à partir d’une instruction.</text:p>
          </table:table-cell>
          <table:table-cell office:value-type="string">
            <text:p>https://www.uneiaparjour.fr/briefed/</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7/2026</text:p>
          </table:table-cell>
        </table:table-row>
        <table:table-row>
          <table:table-cell office:value-type="string">
            <text:p>Acti</text:p>
          </table:table-cell>
          <table:table-cell office:value-type="string">
            <text:p>Acti (https://openacti.com) transforme le clavier du téléphone en assistant IA : instruction en langage naturel, exécution d’actions dans les autres applications, bibliothèque de plus de 150 outils intégrés.</text:p>
          </table:table-cell>
          <table:table-cell office:value-type="string">
            <text:p>https://www.uneiaparjour.fr/acti/</text:p>
          </table:table-cell>
          <table:table-cell office:value-type="string">
            <text:p>automatisation</text:p>
          </table:table-cell>
          <table:table-cell office:value-type="string">
            <text:p>chatbot</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03/07/2026</text:p>
          </table:table-cell>
        </table:table-row>
        <table:table-row>
          <table:table-cell office:value-type="string">
            <text:p>LearnKata</text:p>
          </table:table-cell>
          <table:table-cell office:value-type="string">
            <text:p>LearnKata (https://learnkata.ai/) transforme une instruction ou des documents importés en supports d’apprentissage : résumés, quiz, flashcards et cartes mentales.</text:p>
          </table:table-cell>
          <table:table-cell office:value-type="string">
            <text:p>https://www.uneiaparjour.fr/learnkata/</text:p>
          </table:table-cell>
          <table:table-cell office:value-type="string">
            <text:p>éducation</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4/07/2026</text:p>
          </table:table-cell>
        </table:table-row>
        <table:table-row>
          <table:table-cell office:value-type="string">
            <text:p>Boogu Image</text:p>
          </table:table-cell>
          <table:table-cell office:value-type="string">
            <text:p>Boogu Image (http://demo-base.boogu.org et documentation : https://github.com/boogu-project/Boogu-Image) génère et édite des images à partir d’une instruction texte, avec rendu de texte intégré en français-anglais et en chinois.</text:p>
          </table:table-cell>
          <table:table-cell office:value-type="string">
            <text:p>https://www.uneiaparjour.fr/boogu-image/</text:p>
          </table:table-cell>
          <table:table-cell office:value-type="string">
            <text:p>images</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7/2026</text:p>
          </table:table-cell>
        </table:table-row>
        <table:table-row>
          <table:table-cell office:value-type="string">
            <text:p>Lumo 2.0</text:p>
          </table:table-cell>
          <table:table-cell office:value-type="string">
            <text:p>Lumo 2.0 (https://lumo.proton.me/) est la nouvelle version de Lumo, le chatbot de Proton qui génère du texte, analyse et génère des images, effectue une recherche web sourcée, et conserve une mémoire contrôlée par l’utilisateur, le tout chiffré de bout en bout.</text:p>
          </table:table-cell>
          <table:table-cell office:value-type="string">
            <text:p>https://www.uneiaparjour.fr/lumo-2-0/</text:p>
          </table:table-cell>
          <table:table-cell office:value-type="string">
            <text:p>chatbot</text:p>
          </table:table-cell>
          <table:table-cell office:value-type="string">
            <text:p>documents</text:p>
          </table:table-cell>
          <table:table-cell office:value-type="string">
            <text:p>FR / EU</text:p>
          </table:table-cell>
          <table:table-cell office:value-type="string">
            <text:p>images</text:p>
          </table:table-cell>
          <table:table-cell office:value-type="string">
            <text:p>sans compte</text:p>
          </table:table-cell>
          <table:table-cell office:value-type="string">
            <text:p>texte</text:p>
          </table:table-cell>
          <table:table-cell office:value-type="string">
            <text:p>01/07/2026</text:p>
          </table:table-cell>
        </table:table-row>
        <table:table-row>
          <table:table-cell office:value-type="string">
            <text:p>Pluno</text:p>
          </table:table-cell>
          <table:table-cell office:value-type="string">
            <text:p>Pluno (https://pluno.ai/browser) est une extension de navigateur qui exécute des tâches dircetement dans les pages web à partir d’une instruction.</text:p>
          </table:table-cell>
          <table:table-cell office:value-type="string">
            <text:p>https://www.uneiaparjour.fr/pluno/</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6/2026</text:p>
          </table:table-cell>
        </table:table-row>
        <table:table-row>
          <table:table-cell office:value-type="string">
            <text:p>Music0 AI</text:p>
          </table:table-cell>
          <table:table-cell office:value-type="string">
            <text:p>Music0 AI (https://music0.org/) génère des morceaux de musique et des clips vidéo depuis une instruction.</text:p>
          </table:table-cell>
          <table:table-cell office:value-type="string">
            <text:p>https://www.uneiaparjour.fr/music0-ai/</text:p>
          </table:table-cell>
          <table:table-cell office:value-type="string">
            <text:p>musique</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6/2026</text:p>
          </table:table-cell>
        </table:table-row>
        <table:table-row>
          <table:table-cell office:value-type="string">
            <text:p>Lolaby</text:p>
          </table:table-cell>
          <table:table-cell office:value-type="string">
            <text:p>Lolaby (https://huggingface.co/spaces/build-small-hackathon/lolaby et documentation : https://huggingface.co/build-small-hackathon/lolaby-llama-3b) génère des berceuses personnalisées à partir d’une image (dessin ou photo), du prénom, de l’âge et des centres d’intérêt d’un enfant.</text:p>
          </table:table-cell>
          <table:table-cell office:value-type="string">
            <text:p>https://www.uneiaparjour.fr/lolaby/</text:p>
          </table:table-cell>
          <table:table-cell office:value-type="string">
            <text:p>langues</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texte</text:p>
          </table:table-cell>
          <table:table-cell office:value-type="string">
            <text:p>voix</text:p>
          </table:table-cell>
          <table:table-cell office:value-type="string">
            <text:p>27/06/2026</text:p>
          </table:table-cell>
        </table:table-row>
        <table:table-row>
          <table:table-cell office:value-type="string">
            <text:p>Mistral OCR 4</text:p>
          </table:table-cell>
          <table:table-cell office:value-type="string">
            <text:p>Mistral OCR 4 (https://console.mistral.ai/build/document-ai/ocr-playground et documentation : https://docs.mistral.ai/models/model-cards/ocr-4-0) extrait et structure le contenu de documents.</text:p>
          </table:table-cell>
          <table:table-cell office:value-type="string">
            <text:p>https://www.uneiaparjour.fr/mistral-ocr-4/</text:p>
          </table:table-cell>
          <table:table-cell office:value-type="string">
            <text:p>documen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6/2026</text:p>
          </table:table-cell>
        </table:table-row>
        <table:table-row>
          <table:table-cell office:value-type="string">
            <text:p>ImagiNPrompt</text:p>
          </table:table-cell>
          <table:table-cell office:value-type="string">
            <text:p>ImagiNPrompt (https://imaginprompt.com/) génère des instructions depuis une image importée ou un texte libre et génère également des images.</text:p>
          </table:table-cell>
          <table:table-cell office:value-type="string">
            <text:p>https://www.uneiaparjour.fr/imaginprompt/</text:p>
          </table:table-cell>
          <table:table-cell office:value-type="string">
            <text:p>images</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6/2026</text:p>
          </table:table-cell>
        </table:table-row>
        <table:table-row>
          <table:table-cell office:value-type="string">
            <text:p>Floor Plan Maker</text:p>
          </table:table-cell>
          <table:table-cell office:value-type="string">
            <text:p>Floor Plan Maker (https://floorplanmaker.ai/) génère des plans, change le style des intérieurs et des façades depuis une photo importée, et convertit des plans 2D en modèles 3D exportables.</text:p>
          </table:table-cell>
          <table:table-cell office:value-type="string">
            <text:p>https://www.uneiaparjour.fr/floor-plan-maker/</text:p>
          </table:table-cell>
          <table:table-cell office:value-type="string">
            <text:p>images</text:p>
          </table:table-cell>
          <table:table-cell office:value-type="string">
            <text:p>images 3D</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5/06/2026</text:p>
          </table:table-cell>
        </table:table-row>
        <table:table-row>
          <table:table-cell office:value-type="string">
            <text:p>JustVibe</text:p>
          </table:table-cell>
          <table:table-cell office:value-type="string">
            <text:p>JustVibe (https://justvibe.com/) génère des applications web interactives à partir d’une instruction.</text:p>
          </table:table-cell>
          <table:table-cell office:value-type="string">
            <text:p>https://www.uneiaparjour.fr/justvibe/</text:p>
          </table:table-cell>
          <table:table-cell office:value-type="string">
            <text:p>application</text:p>
          </table:table-cell>
          <table:table-cell office:value-type="string">
            <text:p>chatbot</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24/06/2026</text:p>
          </table:table-cell>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