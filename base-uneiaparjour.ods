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MAI Playground</text:p>
          </table:table-cell>
          <table:table-cell office:value-type="string">
            <text:p>MAI Playground (https://playground.microsoft.ai/) donne accès aux modèles IA de Microsoft : génération d’images, transcription audio, synthèse vocale et conversation multimodale.</text:p>
          </table:table-cell>
          <table:table-cell office:value-type="string">
            <text:p>https://www.uneiaparjour.fr/mai-playground/</text:p>
          </table:table-cell>
          <table:table-cell office:value-type="string">
            <text:p>images</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04/06/2026</text:p>
          </table:table-cell>
        </table:table-row>
        <table:table-row>
          <table:table-cell office:value-type="string">
            <text:p>Overline</text:p>
          </table:table-cell>
          <table:table-cell office:value-type="string">
            <text:p>Overline (https://overline.live/) est une extension Chrome qui ajoute des sous-titres en temps réel et une traduction en direct en superposition sur n’importe quelle vidéo du navigateur, sans fichier de sous-titres et sans changer d’onglet.</text:p>
          </table:table-cell>
          <table:table-cell office:value-type="string">
            <text:p>https://www.uneiaparjour.fr/overline/</text:p>
          </table:table-cell>
          <table:table-cell office:value-type="string">
            <text:p>langu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6/2026</text:p>
          </table:table-cell>
        </table:table-row>
        <table:table-row>
          <table:table-cell office:value-type="string">
            <text:p>WorkInProcess</text:p>
          </table:table-cell>
          <table:table-cell office:value-type="string">
            <text:p>WorkInProcess (https://workinprocess.app/) est un studio d’édition d’images en ligne dont les modèles IA s’exécutent entièrement dans le navigateur, sans envoi de fichiers vers un serveur.</text:p>
          </table:table-cell>
          <table:table-cell office:value-type="string">
            <text:p>https://www.uneiaparjour.fr/workinprocess/</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2/06/2026</text:p>
          </table:table-cell>
        </table:table-row>
        <table:table-row>
          <table:table-cell office:value-type="string">
            <text:p>DocsToAudio</text:p>
          </table:table-cell>
          <table:table-cell office:value-type="string">
            <text:p>DocsToAudio (https://docstoaudio.online/) convertit des fichiers pdf, epub, docx et txt en audio MP3 ou M4B avec 300 voix IA dans 50 langues disponibles (13 francophones dont 5 françaises)</text:p>
          </table:table-cell>
          <table:table-cell office:value-type="string">
            <text:p>https://www.uneiaparjour.fr/docstoaudio/</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01/06/2026</text:p>
          </table:table-cell>
        </table:table-row>
        <table:table-row>
          <table:table-cell office:value-type="string">
            <text:p>Explainpaper</text:p>
          </table:table-cell>
          <table:table-cell office:value-type="string">
            <text:p>Explainpaper (https://www.explainpaper.com/) explique les passages difficiles d’un fichier pdf.Orienté artciles de recherche mais fonctionne avec tout pdf.</text:p>
          </table:table-cell>
          <table:table-cell office:value-type="string">
            <text:p>https://www.uneiaparjour.fr/explainpaper/</text:p>
          </table:table-cell>
          <table:table-cell office:value-type="string">
            <text:p>documents</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5/2026</text:p>
          </table:table-cell>
        </table:table-row>
        <table:table-row>
          <table:table-cell office:value-type="string">
            <text:p>HappySeeds</text:p>
          </table:table-cell>
          <table:table-cell office:value-type="string">
            <text:p>HappySeeds (https://happyseeds.ai) génère des applications web à partir d’une instruction.</text:p>
          </table:table-cell>
          <table:table-cell office:value-type="string">
            <text:p>https://www.uneiaparjour.fr/happyseeds/</text:p>
          </table:table-cell>
          <table:table-cell office:value-type="string">
            <text:p>applic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1/05/2026</text:p>
          </table:table-cell>
        </table:table-row>
        <table:table-row>
          <table:table-cell office:value-type="string">
            <text:p>MeshGPT</text:p>
          </table:table-cell>
          <table:table-cell office:value-type="string">
            <text:p>MeshGPT (https://meshgpt.io/) génère des modèles 3D à partir d’une instruction texte ou d’une image.</text:p>
          </table:table-cell>
          <table:table-cell office:value-type="string">
            <text:p>https://www.uneiaparjour.fr/meshgpt/</text:p>
          </table:table-cell>
          <table:table-cell office:value-type="string">
            <text:p>images 3D</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5/2026</text:p>
          </table:table-cell>
        </table:table-row>
        <table:table-row>
          <table:table-cell office:value-type="string">
            <text:p>MindChat World</text:p>
          </table:table-cell>
          <table:table-cell office:value-type="string">
            <text:p>MindChat World (https://mindchat.world/fr/) permet de converser par écrit avec des personnages historiques simulés dans un chatbot : écrivains, philosophes et scientifiques.</text:p>
          </table:table-cell>
          <table:table-cell office:value-type="string">
            <text:p>https://www.uneiaparjour.fr/mindchat-world/</text:p>
          </table:table-cell>
          <table:table-cell office:value-type="string">
            <text:p>chatbot</text:p>
          </table:table-cell>
          <table:table-cell office:value-type="string">
            <text:p>FR / EU</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5/2026</text:p>
          </table:table-cell>
        </table:table-row>
        <table:table-row>
          <table:table-cell office:value-type="string">
            <text:p>Ecosia</text:p>
          </table:table-cell>
          <table:table-cell office:value-type="string">
            <text:p>Ecosia (https://www.ecosia.org) est un moteur de recherche, basé sur Bing, Google et Qwant, à but non lucratif dont les profits issus de la publicité, financent des projets de reforestation et d’energie renouvelables.Intègre deux fonctionnalités IA : des résumés générés (AI Overviews) et un mode conversationnel (Chat IA).</text:p>
          </table:table-cell>
          <table:table-cell office:value-type="string">
            <text:p>https://www.uneiaparjour.fr/ecosia/</text:p>
          </table:table-cell>
          <table:table-cell office:value-type="string">
            <text:p>FR / EU</text:p>
          </table:table-cell>
          <table:table-cell office:value-type="string">
            <text:p>recherch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7/05/2026</text:p>
          </table:table-cell>
        </table:table-row>
        <table:table-row>
          <table:table-cell office:value-type="string">
            <text:p>Stable Audio 3</text:p>
          </table:table-cell>
          <table:table-cell office:value-type="string">
            <text:p>Stable Audio 3 (https://huggingface.co/collections/stabilityai/stable-audio-3) est la nouvelle version du modèle de génération de musique de la famille Stable Audio déjà vue par ici. Open source pour 3 de ses 4 variantes, génère des morceaux de musique instrumentale et des effets sonores depuis une instruction, avec des sons / musiques pouvant être ajoutés comme repères.</text:p>
          </table:table-cell>
          <table:table-cell office:value-type="string">
            <text:p>https://www.uneiaparjour.fr/stable-audio-3/</text:p>
          </table:table-cell>
          <table:table-cell office:value-type="string">
            <text:p>musique</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5/2026</text:p>
          </table:table-cell>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