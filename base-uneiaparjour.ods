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AIStoryHub</text:p>
          </table:table-cell>
          <table:table-cell office:value-type="string">
            <text:p>AIStoryHub (https://aistoryhub.co/) génère des chapitres de fiction à partir d’une instruction.</text:p>
          </table:table-cell>
          <table:table-cell office:value-type="string">
            <text:p>https://www.uneiaparjour.fr/aistoryhub/</text:p>
          </table:table-cell>
          <table:table-cell office:value-type="string">
            <text:p>tex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7/2026</text:p>
          </table:table-cell>
        </table:table-row>
        <table:table-row>
          <table:table-cell office:value-type="string">
            <text:p>Playyy</text:p>
          </table:table-cell>
          <table:table-cell office:value-type="string">
            <text:p>Playyy (https://playyy.ai/) génère et édite des visuels par instruction sur un tableau blanc entièrement modifiable.</text:p>
          </table:table-cell>
          <table:table-cell office:value-type="string">
            <text:p>https://www.uneiaparjour.fr/playyy/</text:p>
          </table:table-cell>
          <table:table-cell office:value-type="string">
            <text:p>chatbot</text:p>
          </table:table-cell>
          <table:table-cell office:value-type="string">
            <text:p>images</text:p>
          </table:table-cell>
          <table:table-cell office:value-type="string">
            <text:p>infographie</text:p>
          </table:table-cell>
          <table:table-cell office:value-type="string">
            <text:p>présentation</text:p>
          </table:table-cell>
          <table:table-cell office:value-type="string">
            <text:p>texte</text:p>
          </table:table-cell>
          <table:table-cell office:value-type="string">
            <text:p/>
          </table:table-cell>
          <table:table-cell office:value-type="string">
            <text:p>22/07/2026</text:p>
          </table:table-cell>
        </table:table-row>
        <table:table-row>
          <table:table-cell office:value-type="string">
            <text:p>Longscribe</text:p>
          </table:table-cell>
          <table:table-cell office:value-type="string">
            <text:p>Longscribe (https://longscribe.com) transcrit des vidéos et enregistrements longs (YouTube, Vimeo, TikTok, Instagram, Facebook, Twitch, X, Dailymotion, SoundCloud ou des fichiers audio/vidéo importés).</text:p>
          </table:table-cell>
          <table:table-cell office:value-type="string">
            <text:p>https://www.uneiaparjour.fr/longscribe/</text:p>
          </table:table-cell>
          <table:table-cell office:value-type="string">
            <text:p>Non classé</text:p>
          </table:table-cell>
          <table:table-cell office:value-type="string">
            <text:p>sans compte</text:p>
          </table:table-cell>
          <table:table-cell office:value-type="string">
            <text:p>texte</text:p>
          </table:table-cell>
          <table:table-cell office:value-type="string">
            <text:p>vidéo</text:p>
          </table:table-cell>
          <table:table-cell office:value-type="string">
            <text:p>voix</text:p>
          </table:table-cell>
          <table:table-cell office:value-type="string">
            <text:p>youtube</text:p>
          </table:table-cell>
          <table:table-cell office:value-type="string">
            <text:p>20/07/2026</text:p>
          </table:table-cell>
        </table:table-row>
        <table:table-row>
          <table:table-cell office:value-type="string">
            <text:p>Deck</text:p>
          </table:table-cell>
          <table:table-cell office:value-type="string">
            <text:p>Deck (https://www.hellodeck.ai/) est un assistant IA joignable par une adresse e-mail dédiée, capable d’automatiser des tâches, de suivre des fils de discussion et d’organiser le travail par projets.</text:p>
          </table:table-cell>
          <table:table-cell office:value-type="string">
            <text:p>https://www.uneiaparjour.fr/deck/</text:p>
          </table:table-cell>
          <table:table-cell office:value-type="string">
            <text:p>automatisation</text:p>
          </table:table-cell>
          <table:table-cell office:value-type="string">
            <text:p>chatbot</text:p>
          </table:table-cell>
          <table:table-cell office:value-type="string">
            <text:p>documents</text:p>
          </table:table-cell>
          <table:table-cell office:value-type="string">
            <text:p/>
          </table:table-cell>
          <table:table-cell office:value-type="string">
            <text:p/>
          </table:table-cell>
          <table:table-cell office:value-type="string">
            <text:p/>
          </table:table-cell>
          <table:table-cell office:value-type="string">
            <text:p>21/07/2026</text:p>
          </table:table-cell>
        </table:table-row>
        <table:table-row>
          <table:table-cell office:value-type="string">
            <text:p>Aye</text:p>
          </table:table-cell>
          <table:table-cell office:value-type="string">
            <text:p>Aye (https://okaapps.com/product/6760281977) est un navigateur web basé sur Chromium avec assistant IA intégré, capable d’analyser une page et de planifier et exécuter des actions.</text:p>
          </table:table-cell>
          <table:table-cell office:value-type="string">
            <text:p>https://www.uneiaparjour.fr/aye/</text:p>
          </table:table-cell>
          <table:table-cell office:value-type="string">
            <text:p>automatisation</text:p>
          </table:table-cell>
          <table:table-cell office:value-type="string">
            <text:p>chatbot</text:p>
          </table:table-cell>
          <table:table-cell office:value-type="string">
            <text:p>navigateur</text:p>
          </table:table-cell>
          <table:table-cell office:value-type="string">
            <text:p>sans compte</text:p>
          </table:table-cell>
          <table:table-cell office:value-type="string">
            <text:p>usage illimité</text:p>
          </table:table-cell>
          <table:table-cell office:value-type="string">
            <text:p/>
          </table:table-cell>
          <table:table-cell office:value-type="string">
            <text:p>19/07/2026</text:p>
          </table:table-cell>
        </table:table-row>
        <table:table-row>
          <table:table-cell office:value-type="string">
            <text:p>MixTranslate</text:p>
          </table:table-cell>
          <table:table-cell office:value-type="string">
            <text:p>MixTranslate (https://mixtranslate.com/) envoie une même instruction de traduction à des modèles de langage en parallèle et sélectionne automatiquement le résultat le plus adapté au ton et au contexte.</text:p>
          </table:table-cell>
          <table:table-cell office:value-type="string">
            <text:p>https://www.uneiaparjour.fr/mixtranslate/</text:p>
          </table:table-cell>
          <table:table-cell office:value-type="string">
            <text:p>langu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8/07/2026</text:p>
          </table:table-cell>
        </table:table-row>
        <table:table-row>
          <table:table-cell office:value-type="string">
            <text:p>Moodboard Creator</text:p>
          </table:table-cell>
          <table:table-cell office:value-type="string">
            <text:p>Moodboard Creator (https://www.moodboardcreator.dev) génère un tableau d’inspirations à partir d’une courte description.</text:p>
          </table:table-cell>
          <table:table-cell office:value-type="string">
            <text:p>https://www.uneiaparjour.fr/moodboard-creator/</text:p>
          </table:table-cell>
          <table:table-cell office:value-type="string">
            <text:p>présentation</text:p>
          </table:table-cell>
          <table:table-cell office:value-type="string">
            <text:p>sans compte</text:p>
          </table:table-cell>
          <table:table-cell office:value-type="string">
            <text:p>texte</text:p>
          </table:table-cell>
          <table:table-cell office:value-type="string">
            <text:p>usage illimité</text:p>
          </table:table-cell>
          <table:table-cell office:value-type="string">
            <text:p/>
          </table:table-cell>
          <table:table-cell office:value-type="string">
            <text:p/>
          </table:table-cell>
          <table:table-cell office:value-type="string">
            <text:p>17/07/2026</text:p>
          </table:table-cell>
        </table:table-row>
        <table:table-row>
          <table:table-cell office:value-type="string">
            <text:p>MemeCam</text:p>
          </table:table-cell>
          <table:table-cell office:value-type="string">
            <text:p>MemeCam (https://www.memecam.io) génère un mème à partir d’une photo importée ou prise via la caméra.</text:p>
          </table:table-cell>
          <table:table-cell office:value-type="string">
            <text:p>https://www.uneiaparjour.fr/memecam/</text:p>
          </table:table-cell>
          <table:table-cell office:value-type="string">
            <text:p>image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6/07/2026</text:p>
          </table:table-cell>
        </table:table-row>
        <table:table-row>
          <table:table-cell office:value-type="string">
            <text:p>Fenzo</text:p>
          </table:table-cell>
          <table:table-cell office:value-type="string">
            <text:p>Fenzo (https://fenzo.ai/) génère un cours interactif structuré à partir d’une instruction ou de documents importés.</text:p>
          </table:table-cell>
          <table:table-cell office:value-type="string">
            <text:p>https://www.uneiaparjour.fr/fenzo/</text:p>
          </table:table-cell>
          <table:table-cell office:value-type="string">
            <text:p>éduc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5/07/2026</text:p>
          </table:table-cell>
        </table:table-row>
        <table:table-row>
          <table:table-cell office:value-type="string">
            <text:p>Convly Image-to-Prompt Generator</text:p>
          </table:table-cell>
          <table:table-cell office:value-type="string">
            <text:p>Convly Image-to-Prompt Generator (https://convly.ai/image-to-prompt/) génère une instruction à partir d’une image importée.</text:p>
          </table:table-cell>
          <table:table-cell office:value-type="string">
            <text:p>https://www.uneiaparjour.fr/convly-image-to-prompt-generator/</text:p>
          </table:table-cell>
          <table:table-cell office:value-type="string">
            <text:p>images</text:p>
          </table:table-cell>
          <table:table-cell office:value-type="string">
            <text:p>sans compte</text:p>
          </table:table-cell>
          <table:table-cell office:value-type="string">
            <text:p>texte</text:p>
          </table:table-cell>
          <table:table-cell office:value-type="string">
            <text:p>usage illimité</text:p>
          </table:table-cell>
          <table:table-cell office:value-type="string">
            <text:p/>
          </table:table-cell>
          <table:table-cell office:value-type="string">
            <text:p/>
          </table:table-cell>
          <table:table-cell office:value-type="string">
            <text:p>14/07/2026</text:p>
          </table:table-cell>
        </table:table-row>
        <table:table-row>
          <table:table-cell office:value-type="string">
            <text:p>Vidmud AI Photo Editor</text:p>
          </table:table-cell>
          <table:table-cell office:value-type="string">
            <text:p>Vidmud AI Photo Editor (https://www.vidmud.com/ai-photo-editor-online.html) modifie une photo à partir d’une instruction textuelle.</text:p>
          </table:table-cell>
          <table:table-cell office:value-type="string">
            <text:p>https://www.uneiaparjour.fr/vidmud-ai-photo-editor/</text:p>
          </table:table-cell>
          <table:table-cell office:value-type="string">
            <text:p>images</text:p>
          </table:table-cell>
          <table:table-cell office:value-type="string">
            <text:p>sans compte</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13/07/2026</text:p>
          </table:table-cell>
        </table:table-row>
        <table:table-row>
          <table:table-cell office:value-type="string">
            <text:p>Video Transcription AI</text:p>
          </table:table-cell>
          <table:table-cell office:value-type="string">
            <text:p>Video Transcription AI (https://videotranscription.ai/) transcrit automatiquement des vidéos Youtube, Tiktok ou Instagram, des fichiers vidéos, audios ou texte avec résumé, chatbot et carte mentale.</text:p>
          </table:table-cell>
          <table:table-cell office:value-type="string">
            <text:p>https://www.uneiaparjour.fr/video-transcription-ai/</text:p>
          </table:table-cell>
          <table:table-cell office:value-type="string">
            <text:p>chatbot</text:p>
          </table:table-cell>
          <table:table-cell office:value-type="string">
            <text:p>documents</text:p>
          </table:table-cell>
          <table:table-cell office:value-type="string">
            <text:p>mindmap</text:p>
          </table:table-cell>
          <table:table-cell office:value-type="string">
            <text:p>sans compte</text:p>
          </table:table-cell>
          <table:table-cell office:value-type="string">
            <text:p>usage illimité</text:p>
          </table:table-cell>
          <table:table-cell office:value-type="string">
            <text:p>youtube</text:p>
          </table:table-cell>
          <table:table-cell office:value-type="string">
            <text:p>12/07/2026</text:p>
          </table:table-cell>
        </table:table-row>
        <table:table-row>
          <table:table-cell office:value-type="string">
            <text:p>Image to 3D AI</text:p>
          </table:table-cell>
          <table:table-cell office:value-type="string">
            <text:p>Image to 3D AI (https://image-to-3d.ai/) génère des modèles 3D à partir d’une image ou d’une instruction texte.</text:p>
          </table:table-cell>
          <table:table-cell office:value-type="string">
            <text:p>https://www.uneiaparjour.fr/image-to-3d-ai/</text:p>
          </table:table-cell>
          <table:table-cell office:value-type="string">
            <text:p>images 3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1/07/2026</text:p>
          </table:table-cell>
        </table:table-row>
        <table:table-row>
          <table:table-cell office:value-type="string">
            <text:p>Kyutai Pocket TTS</text:p>
          </table:table-cell>
          <table:table-cell office:value-type="string">
            <text:p>Kyutai Pocket TTS (https://kyutai.org/tts/ — documentation : https://github.com/kyutai-labs/pocket-tts) est un modèle open source de synthèse vocale.</text:p>
          </table:table-cell>
          <table:table-cell office:value-type="string">
            <text:p>https://www.uneiaparjour.fr/kyutai-pocket-tts/</text:p>
          </table:table-cell>
          <table:table-cell office:value-type="string">
            <text:p>sans compte</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10/07/2026</text:p>
          </table:table-cell>
        </table:table-row>
        <table:table-row>
          <table:table-cell office:value-type="string">
            <text:p>Assistant IA ÊtrePROF</text:p>
          </table:table-cell>
          <table:table-cell office:value-type="string">
            <text:p>L’Assistant IA ÊtrePROF (https://nouvel.etreprof.fr/preparer-seance-sequence) génère des des séances pédagogiques et une fiche professeur à partir d’une instruction rédigée sous forme d’informations choisies qui décrivent la séance, le niveau, la discipline et le profil de la classe (couvre la petite section à la terminale.)</text:p>
          </table:table-cell>
          <table:table-cell office:value-type="string">
            <text:p>https://www.uneiaparjour.fr/assistant-ia-etreprof/</text:p>
          </table:table-cell>
          <table:table-cell office:value-type="string">
            <text:p>éducation</text:p>
          </table:table-cell>
          <table:table-cell office:value-type="string">
            <text:p>tex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08/07/2026</text:p>
          </table:table-cell>
        </table:table-row>
        <table:table-row>
          <table:table-cell office:value-type="string">
            <text:p>Muse Image</text:p>
          </table:table-cell>
          <table:table-cell office:value-type="string">
            <text:p>Muse Image (https://www.meta.ai) génère et modifie des images à partir d’instructions en langage naturel, avec fusion de plusieurs photos et rendu de texte lisible dans l’image.</text:p>
          </table:table-cell>
          <table:table-cell office:value-type="string">
            <text:p>https://www.uneiaparjour.fr/muse-image/</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7/2026</text:p>
          </table:table-cell>
        </table:table-row>
        <table:table-row>
          <table:table-cell office:value-type="string">
            <text:p>ChecklistFox</text:p>
          </table:table-cell>
          <table:table-cell office:value-type="string">
            <text:p>ChecklistFox (https://checklistfox.com/) génère des checklists personnalisées à partir d’une instruction ou de modèles, exportables en PDF.</text:p>
          </table:table-cell>
          <table:table-cell office:value-type="string">
            <text:p>https://www.uneiaparjour.fr/checklistfox/</text:p>
          </table:table-cell>
          <table:table-cell office:value-type="string">
            <text:p>tex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7/2026</text:p>
          </table:table-cell>
        </table:table-row>
        <table:table-row>
          <table:table-cell office:value-type="string">
            <text:p>Bubul</text:p>
          </table:table-cell>
          <table:table-cell office:value-type="string">
            <text:p>Bubul (https://bubul.app/) propose huit outils IA destinés aux enseignants et formateurs :</text:p>
          </table:table-cell>
          <table:table-cell office:value-type="string">
            <text:p>https://www.uneiaparjour.fr/bubul/</text:p>
          </table:table-cell>
          <table:table-cell office:value-type="string">
            <text:p>éducation</text:p>
          </table:table-cell>
          <table:table-cell office:value-type="string">
            <text:p>FR / EU</text:p>
          </table:table-cell>
          <table:table-cell office:value-type="string">
            <text:p>images</text:p>
          </table:table-cell>
          <table:table-cell office:value-type="string">
            <text:p>présentation</text:p>
          </table:table-cell>
          <table:table-cell office:value-type="string">
            <text:p/>
          </table:table-cell>
          <table:table-cell office:value-type="string">
            <text:p/>
          </table:table-cell>
          <table:table-cell office:value-type="string">
            <text:p>06/07/2026</text:p>
          </table:table-cell>
        </table:table-row>
        <table:table-row>
          <table:table-cell office:value-type="string">
            <text:p>Briefed</text:p>
          </table:table-cell>
          <table:table-cell office:value-type="string">
            <text:p>Briefed (https://briefednewsletter.com/) génère une newsletter personnalisée par IA à partir d’une instruction.</text:p>
          </table:table-cell>
          <table:table-cell office:value-type="string">
            <text:p>https://www.uneiaparjour.fr/briefed/</text:p>
          </table:table-cell>
          <table:table-cell office:value-type="string">
            <text:p>actualités et fact-checking</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7/2026</text:p>
          </table:table-cell>
        </table:table-row>
        <table:table-row>
          <table:table-cell office:value-type="string">
            <text:p>Acti</text:p>
          </table:table-cell>
          <table:table-cell office:value-type="string">
            <text:p>Acti (https://openacti.com) transforme le clavier du téléphone en assistant IA : instruction en langage naturel, exécution d’actions dans les autres applications, bibliothèque de plus de 150 outils intégrés.</text:p>
          </table:table-cell>
          <table:table-cell office:value-type="string">
            <text:p>https://www.uneiaparjour.fr/acti/</text:p>
          </table:table-cell>
          <table:table-cell office:value-type="string">
            <text:p>automatisation</text:p>
          </table:table-cell>
          <table:table-cell office:value-type="string">
            <text:p>chatbot</text:p>
          </table:table-cell>
          <table:table-cell office:value-type="string">
            <text:p>texte</text:p>
          </table:table-cell>
          <table:table-cell office:value-type="string">
            <text:p/>
          </table:table-cell>
          <table:table-cell office:value-type="string">
            <text:p/>
          </table:table-cell>
          <table:table-cell office:value-type="string">
            <text:p/>
          </table:table-cell>
          <table:table-cell office:value-type="string">
            <text:p>03/07/2026</text:p>
          </table:table-cell>
        </table:table-row>
        <table:table-row>
          <table:table-cell office:value-type="string">
            <text:p>LearnKata</text:p>
          </table:table-cell>
          <table:table-cell office:value-type="string">
            <text:p>LearnKata (https://learnkata.ai/) transforme une instruction ou des documents importés en supports d’apprentissage : résumés, quiz, flashcards et cartes mentales.</text:p>
          </table:table-cell>
          <table:table-cell office:value-type="string">
            <text:p>https://www.uneiaparjour.fr/learnkata/</text:p>
          </table:table-cell>
          <table:table-cell office:value-type="string">
            <text:p>éducation</text:p>
          </table:table-cell>
          <table:table-cell office:value-type="string">
            <text:p>quiz et flashcard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4/07/2026</text:p>
          </table:table-cell>
        </table:table-row>
        <table:table-row>
          <table:table-cell office:value-type="string">
            <text:p>Boogu Image</text:p>
          </table:table-cell>
          <table:table-cell office:value-type="string">
            <text:p>Boogu Image (http://demo-base.boogu.org et documentation : https://github.com/boogu-project/Boogu-Image) génère et édite des images à partir d’une instruction texte, avec rendu de texte intégré en français-anglais et en chinois.</text:p>
          </table:table-cell>
          <table:table-cell office:value-type="string">
            <text:p>https://www.uneiaparjour.fr/boogu-image/</text:p>
          </table:table-cell>
          <table:table-cell office:value-type="string">
            <text:p>images</text:p>
          </table:table-cell>
          <table:table-cell office:value-type="string">
            <text:p>open 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7/2026</text:p>
          </table:table-cell>
        </table:table-row>
        <table:table-row>
          <table:table-cell office:value-type="string">
            <text:p>Lumo 2.0</text:p>
          </table:table-cell>
          <table:table-cell office:value-type="string">
            <text:p>Lumo 2.0 (https://lumo.proton.me/) est la nouvelle version de Lumo, le chatbot de Proton qui génère du texte, analyse et génère des images, effectue une recherche web sourcée, et conserve une mémoire contrôlée par l’utilisateur, le tout chiffré de bout en bout.</text:p>
          </table:table-cell>
          <table:table-cell office:value-type="string">
            <text:p>https://www.uneiaparjour.fr/lumo-2-0/</text:p>
          </table:table-cell>
          <table:table-cell office:value-type="string">
            <text:p>chatbot</text:p>
          </table:table-cell>
          <table:table-cell office:value-type="string">
            <text:p>documents</text:p>
          </table:table-cell>
          <table:table-cell office:value-type="string">
            <text:p>FR / EU</text:p>
          </table:table-cell>
          <table:table-cell office:value-type="string">
            <text:p>images</text:p>
          </table:table-cell>
          <table:table-cell office:value-type="string">
            <text:p>sans compte</text:p>
          </table:table-cell>
          <table:table-cell office:value-type="string">
            <text:p>texte</text:p>
          </table:table-cell>
          <table:table-cell office:value-type="string">
            <text:p>01/07/2026</text:p>
          </table:table-cell>
        </table:table-row>
        <table:table-row>
          <table:table-cell office:value-type="string">
            <text:p>Pluno</text:p>
          </table:table-cell>
          <table:table-cell office:value-type="string">
            <text:p>Pluno (https://pluno.ai/browser) est une extension de navigateur qui exécute des tâches dircetement dans les pages web à partir d’une instruction.</text:p>
          </table:table-cell>
          <table:table-cell office:value-type="string">
            <text:p>https://www.uneiaparjour.fr/pluno/</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0/06/2026</text:p>
          </table:table-cell>
        </table:table-row>
        <table:table-row>
          <table:table-cell office:value-type="string">
            <text:p>Music0 AI</text:p>
          </table:table-cell>
          <table:table-cell office:value-type="string">
            <text:p>Music0 AI (https://music0.org/) génère des morceaux de musique et des clips vidéo depuis une instruction.</text:p>
          </table:table-cell>
          <table:table-cell office:value-type="string">
            <text:p>https://www.uneiaparjour.fr/music0-ai/</text:p>
          </table:table-cell>
          <table:table-cell office:value-type="string">
            <text:p>musique</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9/06/2026</text:p>
          </table:table-cell>
        </table:table-row>
        <table:table-row>
          <table:table-cell office:value-type="string">
            <text:p>Lolaby</text:p>
          </table:table-cell>
          <table:table-cell office:value-type="string">
            <text:p>Lolaby (https://huggingface.co/spaces/build-small-hackathon/lolaby et documentation : https://huggingface.co/build-small-hackathon/lolaby-llama-3b) génère des berceuses personnalisées à partir d’une image (dessin ou photo), du prénom, de l’âge et des centres d’intérêt d’un enfant.</text:p>
          </table:table-cell>
          <table:table-cell office:value-type="string">
            <text:p>https://www.uneiaparjour.fr/lolaby/</text:p>
          </table:table-cell>
          <table:table-cell office:value-type="string">
            <text:p>langues</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texte</text:p>
          </table:table-cell>
          <table:table-cell office:value-type="string">
            <text:p>voix</text:p>
          </table:table-cell>
          <table:table-cell office:value-type="string">
            <text:p>27/06/2026</text:p>
          </table:table-cell>
        </table:table-row>
        <table:table-row>
          <table:table-cell office:value-type="string">
            <text:p>Mistral OCR 4</text:p>
          </table:table-cell>
          <table:table-cell office:value-type="string">
            <text:p>Mistral OCR 4 (https://console.mistral.ai/build/document-ai/ocr-playground et documentation : https://docs.mistral.ai/models/model-cards/ocr-4-0) extrait et structure le contenu de documents.</text:p>
          </table:table-cell>
          <table:table-cell office:value-type="string">
            <text:p>https://www.uneiaparjour.fr/mistral-ocr-4/</text:p>
          </table:table-cell>
          <table:table-cell office:value-type="string">
            <text:p>document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6/2026</text:p>
          </table:table-cell>
        </table:table-row>
        <table:table-row>
          <table:table-cell office:value-type="string">
            <text:p>ImagiNPrompt</text:p>
          </table:table-cell>
          <table:table-cell office:value-type="string">
            <text:p>ImagiNPrompt (https://imaginprompt.com/) génère des instructions depuis une image importée ou un texte libre et génère également des images.</text:p>
          </table:table-cell>
          <table:table-cell office:value-type="string">
            <text:p>https://www.uneiaparjour.fr/imaginprompt/</text:p>
          </table:table-cell>
          <table:table-cell office:value-type="string">
            <text:p>images</text:p>
          </table:table-cell>
          <table:table-cell office:value-type="string">
            <text:p>tex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6/06/2026</text:p>
          </table:table-cell>
        </table:table-row>
        <table:table-row>
          <table:table-cell office:value-type="string">
            <text:p>Floor Plan Maker</text:p>
          </table:table-cell>
          <table:table-cell office:value-type="string">
            <text:p>Floor Plan Maker (https://floorplanmaker.ai/) génère des plans, change le style des intérieurs et des façades depuis une photo importée, et convertit des plans 2D en modèles 3D exportables.</text:p>
          </table:table-cell>
          <table:table-cell office:value-type="string">
            <text:p>https://www.uneiaparjour.fr/floor-plan-maker/</text:p>
          </table:table-cell>
          <table:table-cell office:value-type="string">
            <text:p>images</text:p>
          </table:table-cell>
          <table:table-cell office:value-type="string">
            <text:p>images 3D</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5/06/2026</text:p>
          </table:table-cell>
        </table:table-row>
        <table:table-row>
          <table:table-cell office:value-type="string">
            <text:p>JustVibe</text:p>
          </table:table-cell>
          <table:table-cell office:value-type="string">
            <text:p>JustVibe (https://justvibe.com/) génère des applications web interactives à partir d’une instruction.</text:p>
          </table:table-cell>
          <table:table-cell office:value-type="string">
            <text:p>https://www.uneiaparjour.fr/justvibe/</text:p>
          </table:table-cell>
          <table:table-cell office:value-type="string">
            <text:p>application</text:p>
          </table:table-cell>
          <table:table-cell office:value-type="string">
            <text:p>chatbot</text:p>
          </table:table-cell>
          <table:table-cell office:value-type="string">
            <text:p>texte</text:p>
          </table:table-cell>
          <table:table-cell office:value-type="string">
            <text:p>usage illimité</text:p>
          </table:table-cell>
          <table:table-cell office:value-type="string">
            <text:p/>
          </table:table-cell>
          <table:table-cell office:value-type="string">
            <text:p/>
          </table:table-cell>
          <table:table-cell office:value-type="string">
            <text:p>24/06/2026</text:p>
          </table:table-cell>
        </table:table-row>
        <table:table-row>
          <table:table-cell office:value-type="string">
            <text:p>Loopa</text:p>
          </table:table-cell>
          <table:table-cell office:value-type="string">
            <text:p>Loopa (https://www.loopa.im) est une plateforme d’agents IA qui exécute des tâches de recherche, création, analyse et automatisation.</text:p>
          </table:table-cell>
          <table:table-cell office:value-type="string">
            <text:p>https://www.uneiaparjour.fr/loopa/</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6/2026</text:p>
          </table:table-cell>
        </table:table-row>
        <table:table-row>
          <table:table-cell office:value-type="string">
            <text:p>MakeInfographic AI</text:p>
          </table:table-cell>
          <table:table-cell office:value-type="string">
            <text:p>MakeInfographic AI (https://www.makeinfographic.ai/) génère des infographies depuis une instruction.</text:p>
          </table:table-cell>
          <table:table-cell office:value-type="string">
            <text:p>https://www.uneiaparjour.fr/makeinfographic-ai/</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6/2026</text:p>
          </table:table-cell>
        </table:table-row>
        <table:table-row>
          <table:table-cell office:value-type="string">
            <text:p>Socrati</text:p>
          </table:table-cell>
          <table:table-cell office:value-type="string">
            <text:p>Socrati (https://socrati.app/) transforme une instruction, un sujet, un PDF, une vidéo YouTube ou une photo en un cours interactif avec leçons, quiz, flashcards (et audio en version payante).</text:p>
          </table:table-cell>
          <table:table-cell office:value-type="string">
            <text:p>https://www.uneiaparjour.fr/socrati/</text:p>
          </table:table-cell>
          <table:table-cell office:value-type="string">
            <text:p>chatbot</text:p>
          </table:table-cell>
          <table:table-cell office:value-type="string">
            <text:p>documents</text:p>
          </table:table-cell>
          <table:table-cell office:value-type="string">
            <text:p>éducation</text:p>
          </table:table-cell>
          <table:table-cell office:value-type="string">
            <text:p>quiz et flashcards</text:p>
          </table:table-cell>
          <table:table-cell office:value-type="string">
            <text:p>texte</text:p>
          </table:table-cell>
          <table:table-cell office:value-type="string">
            <text:p/>
          </table:table-cell>
          <table:table-cell office:value-type="string">
            <text:p>20/06/2026</text:p>
          </table:table-cell>
        </table:table-row>
        <table:table-row>
          <table:table-cell office:value-type="string">
            <text:p>Veritas Source</text:p>
          </table:table-cell>
          <table:table-cell office:value-type="string">
            <text:p>Veritas Source (https://veritas-source.com/) analyse une URL, un texte ou une image pour en évaluer la source : biais politique, propriétaire, financement, antécédents éditoriaux, et signes de génération par IA.</text:p>
          </table:table-cell>
          <table:table-cell office:value-type="string">
            <text:p>https://www.uneiaparjour.fr/veritas-source/</text:p>
          </table:table-cell>
          <table:table-cell office:value-type="string">
            <text:p>actualités et fact-checking</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9/06/2026</text:p>
          </table:table-cell>
        </table:table-row>
        <table:table-row>
          <table:table-cell office:value-type="string">
            <text:p>Swishy</text:p>
          </table:table-cell>
          <table:table-cell office:value-type="string">
            <text:p>Swishy (https://www.swishy.ai/) génère des animations motion design (typographies ou objets animés) depuis une instruction en langage naturel.</text:p>
          </table:table-cell>
          <table:table-cell office:value-type="string">
            <text:p>https://www.uneiaparjour.fr/swishy/</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8/06/2026</text:p>
          </table:table-cell>
        </table:table-row>
        <table:table-row>
          <table:table-cell office:value-type="string">
            <text:p>Clarify AI</text:p>
          </table:table-cell>
          <table:table-cell office:value-type="string">
            <text:p>Clarify AI (https://www.clarify-ai.com/) découpe une problèmatique en un arbre de sous-questions hiérarchisées, avec recherche web et export en texte structuré.</text:p>
          </table:table-cell>
          <table:table-cell office:value-type="string">
            <text:p>https://www.uneiaparjour.fr/clarify-ai/</text:p>
          </table:table-cell>
          <table:table-cell office:value-type="string">
            <text:p>mindmap</text:p>
          </table:table-cell>
          <table:table-cell office:value-type="string">
            <text:p>recherche</text:p>
          </table:table-cell>
          <table:table-cell office:value-type="string">
            <text:p>texte</text:p>
          </table:table-cell>
          <table:table-cell office:value-type="string">
            <text:p/>
          </table:table-cell>
          <table:table-cell office:value-type="string">
            <text:p/>
          </table:table-cell>
          <table:table-cell office:value-type="string">
            <text:p/>
          </table:table-cell>
          <table:table-cell office:value-type="string">
            <text:p>17/06/2026</text:p>
          </table:table-cell>
        </table:table-row>
        <table:table-row>
          <table:table-cell office:value-type="string">
            <text:p>Drafted</text:p>
          </table:table-cell>
          <table:table-cell office:value-type="string">
            <text:p>Drafted (https://www.drafted.ai/) génère des plans de maison à partir d’une liste de pièces, d’une forme de terrain et un style.</text:p>
          </table:table-cell>
          <table:table-cell office:value-type="string">
            <text:p>https://www.uneiaparjour.fr/drafted/</text:p>
          </table:table-cell>
          <table:table-cell office:value-type="string">
            <text:p>images</text:p>
          </table:table-cell>
          <table:table-cell office:value-type="string">
            <text:p>images 3D</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6/06/2026</text:p>
          </table:table-cell>
        </table:table-row>
        <table:table-row>
          <table:table-cell office:value-type="string">
            <text:p>ManualFig</text:p>
          </table:table-cell>
          <table:table-cell office:value-type="string">
            <text:p>ManualFig (https://manualfig.ai/) transforme une photo en notice de montage, mode d’emploi ou schéma d’utilisation à partir d’une image et d’une isntruction.</text:p>
          </table:table-cell>
          <table:table-cell office:value-type="string">
            <text:p>https://www.uneiaparjour.fr/manualfig/</text:p>
          </table:table-cell>
          <table:table-cell office:value-type="string">
            <text:p>images</text:p>
          </table:table-cell>
          <table:table-cell office:value-type="string">
            <text:p>tutorie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5/06/2026</text:p>
          </table:table-cell>
        </table:table-row>
        <table:table-row>
          <table:table-cell office:value-type="string">
            <text:p>Happycapy</text:p>
          </table:table-cell>
          <table:table-cell office:value-type="string">
            <text:p>Happycapy (https://happycapy.ai/) est un chatbot avec des agents IA pour exécuter dans le navigateur des tâches à la place de l’utilisateur.</text:p>
          </table:table-cell>
          <table:table-cell office:value-type="string">
            <text:p>https://www.uneiaparjour.fr/happycapy/</text:p>
          </table:table-cell>
          <table:table-cell office:value-type="string">
            <text:p>chatbot</text:p>
          </table:table-cell>
          <table:table-cell office:value-type="string">
            <text:p>documents</text:p>
          </table:table-cell>
          <table:table-cell office:value-type="string">
            <text:p>images</text:p>
          </table:table-cell>
          <table:table-cell office:value-type="string">
            <text:p>présentation</text:p>
          </table:table-cell>
          <table:table-cell office:value-type="string">
            <text:p>recherche</text:p>
          </table:table-cell>
          <table:table-cell office:value-type="string">
            <text:p/>
          </table:table-cell>
          <table:table-cell office:value-type="string">
            <text:p>14/06/2026</text:p>
          </table:table-cell>
        </table:table-row>
        <table:table-row>
          <table:table-cell office:value-type="string">
            <text:p>PDFFly PDF summarizer</text:p>
          </table:table-cell>
          <table:table-cell office:value-type="string">
            <text:p>PDFFly (https://pdffly.com/pdf-summarizer) génère un résumé structuré depuis un PDF importé et permet d’interroger le document via un chatbot.</text:p>
          </table:table-cell>
          <table:table-cell office:value-type="string">
            <text:p>https://www.uneiaparjour.fr/pdffly-pdf-summarizer/</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3/06/2026</text:p>
          </table:table-cell>
        </table:table-row>
        <table:table-row>
          <table:table-cell office:value-type="string">
            <text:p>Inkfox AI</text:p>
          </table:table-cell>
          <table:table-cell office:value-type="string">
            <text:p>Inkfox AI (https://inkfox.app/) génère des images et des vidéos par instruction, sans inscription nécessaire.</text:p>
          </table:table-cell>
          <table:table-cell office:value-type="string">
            <text:p>https://www.uneiaparjour.fr/inkfox-ai/</text:p>
          </table:table-cell>
          <table:table-cell office:value-type="string">
            <text:p>images</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2/06/2026</text:p>
          </table:table-cell>
        </table:table-row>
        <table:table-row>
          <table:table-cell office:value-type="string">
            <text:p>Lium</text:p>
          </table:table-cell>
          <table:table-cell office:value-type="string">
            <text:p>Lium (https://www.lium.ai/) connecte des sources de données complexes (bases, fichiers, API…) et répond en langage naturel par des analyses, scripts ou outils générés par IA.</text:p>
          </table:table-cell>
          <table:table-cell office:value-type="string">
            <text:p>https://www.uneiaparjour.fr/lium/</text:p>
          </table:table-cell>
          <table:table-cell office:value-type="string">
            <text:p>chatbot</text:p>
          </table:table-cell>
          <table:table-cell office:value-type="string">
            <text:p>donné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1/06/2026</text:p>
          </table:table-cell>
        </table:table-row>
        <table:table-row>
          <table:table-cell office:value-type="string">
            <text:p>ChordGen</text:p>
          </table:table-cell>
          <table:table-cell office:value-type="string">
            <text:p>ChordGen (https://www.chordgen.org/) génère des progressions d’accords à partir d’une instruction décrivant une ambiance ou un genre musical et un nombre d’accords.</text:p>
          </table:table-cell>
          <table:table-cell office:value-type="string">
            <text:p>https://www.uneiaparjour.fr/chordgen/</text:p>
          </table:table-cell>
          <table:table-cell office:value-type="string">
            <text:p>musiqu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0/06/2026</text:p>
          </table:table-cell>
        </table:table-row>
        <table:table-row>
          <table:table-cell office:value-type="string">
            <text:p>Open Paper</text:p>
          </table:table-cell>
          <table:table-cell office:value-type="string">
            <text:p>Open Paper (application : https://openpaper.ai/ et documentation : https://github.com/khoj-ai/openpaper) permet de lire, annoter et interroger des articles de recherche académique.</text:p>
          </table:table-cell>
          <table:table-cell office:value-type="string">
            <text:p>https://www.uneiaparjour.fr/open-paper/</text:p>
          </table:table-cell>
          <table:table-cell office:value-type="string">
            <text:p>documents</text:p>
          </table:table-cell>
          <table:table-cell office:value-type="string">
            <text:p>open source</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9/06/2026</text:p>
          </table:table-cell>
        </table:table-row>
        <table:table-row>
          <table:table-cell office:value-type="string">
            <text:p>InfoBlog</text:p>
          </table:table-cell>
          <table:table-cell office:value-type="string">
            <text:p>InfoBlog (https://useinfoblog.com/) transforme des instruction et/ou documents en présentations, carrousels ou infographies éditables.</text:p>
          </table:table-cell>
          <table:table-cell office:value-type="string">
            <text:p>https://www.uneiaparjour.fr/infoblog/</text:p>
          </table:table-cell>
          <table:table-cell office:value-type="string">
            <text:p>images</text:p>
          </table:table-cell>
          <table:table-cell office:value-type="string">
            <text:p>infographi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08/06/2026</text:p>
          </table:table-cell>
        </table:table-row>
        <table:table-row>
          <table:table-cell office:value-type="string">
            <text:p>Is it Fake ?</text:p>
          </table:table-cell>
          <table:table-cell office:value-type="string">
            <text:p>Is it Fake ? (https://isitfake.app/) vérifie la crédibilité d’articles de presse via leur url.</text:p>
          </table:table-cell>
          <table:table-cell office:value-type="string">
            <text:p>https://www.uneiaparjour.fr/is-it-fake/</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6/2026</text:p>
          </table:table-cell>
        </table:table-row>
        <table:table-row>
          <table:table-cell office:value-type="string">
            <text:p>Arena</text:p>
          </table:table-cell>
          <table:table-cell office:value-type="string">
            <text:p>Arena (https://arena.ai/) est la version commerciale de Chatbot Arena, relancée en janvier 2026 sous un nouveau nom et une nouvelle URL, avec des fonctionnalités étendues. Le site est également accessible sur HuggingFace (https://huggingface.co/lmarena-ai).</text:p>
          </table:table-cell>
          <table:table-cell office:value-type="string">
            <text:p>https://www.uneiaparjour.fr/arena/</text:p>
          </table:table-cell>
          <table:table-cell office:value-type="string">
            <text:p>chatbot</text:p>
          </table:table-cell>
          <table:table-cell office:value-type="string">
            <text:p>documents</text:p>
          </table:table-cell>
          <table:table-cell office:value-type="string">
            <text:p>images</text:p>
          </table:table-cell>
          <table:table-cell office:value-type="string">
            <text:p>LLM</text:p>
          </table:table-cell>
          <table:table-cell office:value-type="string">
            <text:p>texte</text:p>
          </table:table-cell>
          <table:table-cell office:value-type="string">
            <text:p>usage illimité</text:p>
          </table:table-cell>
          <table:table-cell office:value-type="string">
            <text:p>06/06/2026</text:p>
          </table:table-cell>
        </table:table-row>
        <table:table-row>
          <table:table-cell office:value-type="string">
            <text:p>PDF to Lesson</text:p>
          </table:table-cell>
          <table:table-cell office:value-type="string">
            <text:p>PDF to Lesson (https://www.pdftolesson.com/ — documentation : https://github.com/Nutlope/pdf-to-interactive-lesson) transforme un document PDF en cours interactif structuré en modules.</text:p>
          </table:table-cell>
          <table:table-cell office:value-type="string">
            <text:p>https://www.uneiaparjour.fr/pdf-to-lesson/</text:p>
          </table:table-cell>
          <table:table-cell office:value-type="string">
            <text:p>documents</text:p>
          </table:table-cell>
          <table:table-cell office:value-type="string">
            <text:p>éduc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05/06/2026</text:p>
          </table:table-cell>
        </table:table-row>
        <table:table-row>
          <table:table-cell office:value-type="string">
            <text:p>MAI Playground</text:p>
          </table:table-cell>
          <table:table-cell office:value-type="string">
            <text:p>MAI Playground (https://playground.microsoft.ai/) donne accès aux modèles IA de Microsoft : génération d’images, transcription audio, synthèse vocale et conversation multimodale.</text:p>
          </table:table-cell>
          <table:table-cell office:value-type="string">
            <text:p>https://www.uneiaparjour.fr/mai-playground/</text:p>
          </table:table-cell>
          <table:table-cell office:value-type="string">
            <text:p>images</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04/06/2026</text:p>
          </table:table-cell>
        </table:table-row>
        <table:table-row>
          <table:table-cell office:value-type="string">
            <text:p>Overline</text:p>
          </table:table-cell>
          <table:table-cell office:value-type="string">
            <text:p>Overline (https://overline.live/) est une extension Chrome qui ajoute des sous-titres en temps réel et une traduction en direct en superposition sur n’importe quelle vidéo du navigateur, sans fichier de sous-titres et sans changer d’onglet.</text:p>
          </table:table-cell>
          <table:table-cell office:value-type="string">
            <text:p>https://www.uneiaparjour.fr/overline/</text:p>
          </table:table-cell>
          <table:table-cell office:value-type="string">
            <text:p>langu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6/2026</text:p>
          </table:table-cell>
        </table:table-row>
        <table:table-row>
          <table:table-cell office:value-type="string">
            <text:p>WorkInProcess</text:p>
          </table:table-cell>
          <table:table-cell office:value-type="string">
            <text:p>WorkInProcess (https://workinprocess.app/) est un studio d’édition d’images en ligne dont les modèles IA s’exécutent entièrement dans le navigateur, sans envoi de fichiers vers un serveur.</text:p>
          </table:table-cell>
          <table:table-cell office:value-type="string">
            <text:p>https://www.uneiaparjour.fr/workinprocess/</text:p>
          </table:table-cell>
          <table:table-cell office:value-type="string">
            <text:p>image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02/06/2026</text:p>
          </table:table-cell>
        </table:table-row>
        <table:table-row>
          <table:table-cell office:value-type="string">
            <text:p>DocsToAudio</text:p>
          </table:table-cell>
          <table:table-cell office:value-type="string">
            <text:p>DocsToAudio (https://docstoaudio.online/) convertit des fichiers pdf, epub, docx et txt en audio MP3 ou M4B avec 300 voix IA dans 50 langues disponibles (13 francophones dont 5 françaises)</text:p>
          </table:table-cell>
          <table:table-cell office:value-type="string">
            <text:p>https://www.uneiaparjour.fr/docstoaudio/</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01/06/2026</text:p>
          </table:table-cell>
        </table:table-row>
        <table:table-row>
          <table:table-cell office:value-type="string">
            <text:p>Explainpaper</text:p>
          </table:table-cell>
          <table:table-cell office:value-type="string">
            <text:p>Explainpaper (https://www.explainpaper.com/) explique les passages difficiles d’un fichier pdf.Orienté artciles de recherche mais fonctionne avec tout pdf.</text:p>
          </table:table-cell>
          <table:table-cell office:value-type="string">
            <text:p>https://www.uneiaparjour.fr/explainpaper/</text:p>
          </table:table-cell>
          <table:table-cell office:value-type="string">
            <text:p>documents</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0/05/2026</text:p>
          </table:table-cell>
        </table:table-row>
        <table:table-row>
          <table:table-cell office:value-type="string">
            <text:p>HappySeeds</text:p>
          </table:table-cell>
          <table:table-cell office:value-type="string">
            <text:p>HappySeeds (https://happyseeds.ai) génère des applications web à partir d’une instruction.</text:p>
          </table:table-cell>
          <table:table-cell office:value-type="string">
            <text:p>https://www.uneiaparjour.fr/happyseeds/</text:p>
          </table:table-cell>
          <table:table-cell office:value-type="string">
            <text:p>applic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1/05/2026</text:p>
          </table:table-cell>
        </table:table-row>
        <table:table-row>
          <table:table-cell office:value-type="string">
            <text:p>MeshGPT</text:p>
          </table:table-cell>
          <table:table-cell office:value-type="string">
            <text:p>MeshGPT (https://meshgpt.io/) génère des modèles 3D à partir d’une instruction texte ou d’une image.</text:p>
          </table:table-cell>
          <table:table-cell office:value-type="string">
            <text:p>https://www.uneiaparjour.fr/meshgpt/</text:p>
          </table:table-cell>
          <table:table-cell office:value-type="string">
            <text:p>images 3D</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9/05/2026</text:p>
          </table:table-cell>
        </table:table-row>
        <table:table-row>
          <table:table-cell office:value-type="string">
            <text:p>MindChat World</text:p>
          </table:table-cell>
          <table:table-cell office:value-type="string">
            <text:p>MindChat World (https://mindchat.world/fr/) permet de converser par écrit avec des personnages historiques simulés dans un chatbot : écrivains, philosophes et scientifiques.</text:p>
          </table:table-cell>
          <table:table-cell office:value-type="string">
            <text:p>https://www.uneiaparjour.fr/mindchat-world/</text:p>
          </table:table-cell>
          <table:table-cell office:value-type="string">
            <text:p>chatbot</text:p>
          </table:table-cell>
          <table:table-cell office:value-type="string">
            <text:p>FR / EU</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5/2026</text:p>
          </table:table-cell>
        </table:table-row>
        <table:table-row>
          <table:table-cell office:value-type="string">
            <text:p>Ecosia</text:p>
          </table:table-cell>
          <table:table-cell office:value-type="string">
            <text:p>Ecosia (https://www.ecosia.org) est un moteur de recherche, basé sur Bing, Google et Qwant, à but non lucratif dont les profits issus de la publicité, financent des projets de reforestation et d’energie renouvelables.Intègre deux fonctionnalités IA : des résumés générés (AI Overviews) et un mode conversationnel (Chat IA).</text:p>
          </table:table-cell>
          <table:table-cell office:value-type="string">
            <text:p>https://www.uneiaparjour.fr/ecosia/</text:p>
          </table:table-cell>
          <table:table-cell office:value-type="string">
            <text:p>FR / EU</text:p>
          </table:table-cell>
          <table:table-cell office:value-type="string">
            <text:p>recherch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7/05/2026</text:p>
          </table:table-cell>
        </table:table-row>
        <table:table-row>
          <table:table-cell office:value-type="string">
            <text:p>Stable Audio 3</text:p>
          </table:table-cell>
          <table:table-cell office:value-type="string">
            <text:p>Stable Audio 3 (https://huggingface.co/collections/stabilityai/stable-audio-3) est la nouvelle version du modèle de génération de musique de la famille Stable Audio déjà vue par ici. Open source pour 3 de ses 4 variantes, génère des morceaux de musique instrumentale et des effets sonores depuis une instruction, avec des sons / musiques pouvant être ajoutés comme repères.</text:p>
          </table:table-cell>
          <table:table-cell office:value-type="string">
            <text:p>https://www.uneiaparjour.fr/stable-audio-3/</text:p>
          </table:table-cell>
          <table:table-cell office:value-type="string">
            <text:p>musique</text:p>
          </table:table-cell>
          <table:table-cell office:value-type="string">
            <text:p>open 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6/05/2026</text:p>
          </table:table-cell>
        </table:table-row>
        <table:table-row>
          <table:table-cell office:value-type="string">
            <text:p>CartoMind</text:p>
          </table:table-cell>
          <table:table-cell office:value-type="string">
            <text:p>CartoMind (https://cartomind.ai/) génère des infographies à partir d’une instruction, d’un texte collé ou d’un document importé (md, pdf, txt, doc).</text:p>
          </table:table-cell>
          <table:table-cell office:value-type="string">
            <text:p>https://www.uneiaparjour.fr/cartomind/</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5/05/2026</text:p>
          </table:table-cell>
        </table:table-row>
        <table:table-row>
          <table:table-cell office:value-type="string">
            <text:p>Dim0</text:p>
          </table:table-cell>
          <table:table-cell office:value-type="string">
            <text:p>Dim0 (https://app.dim0.net et documentation : https://github.com/vcmf/dim0) est un tableau infini qui peut être rempli avec des documens, des notes, du code ou des schémas avec un agent IA intégré et organisé sous forme de cartes heuristiques.</text:p>
          </table:table-cell>
          <table:table-cell office:value-type="string">
            <text:p>https://www.uneiaparjour.fr/dim0/</text:p>
          </table:table-cell>
          <table:table-cell office:value-type="string">
            <text:p>mindmap</text:p>
          </table:table-cell>
          <table:table-cell office:value-type="string">
            <text:p>open source</text:p>
          </table:table-cell>
          <table:table-cell office:value-type="string">
            <text:p>quiz et flashcards</text:p>
          </table:table-cell>
          <table:table-cell office:value-type="string">
            <text:p/>
          </table:table-cell>
          <table:table-cell office:value-type="string">
            <text:p/>
          </table:table-cell>
          <table:table-cell office:value-type="string">
            <text:p/>
          </table:table-cell>
          <table:table-cell office:value-type="string">
            <text:p>23/05/2026</text:p>
          </table:table-cell>
        </table:table-row>
        <table:table-row>
          <table:table-cell office:value-type="string">
            <text:p>Our stories</text:p>
          </table:table-cell>
          <table:table-cell office:value-type="string">
            <text:p>Our Stories (https://readourstories.org/) génère des histoires pour enfants à partir d’une instruction.</text:p>
          </table:table-cell>
          <table:table-cell office:value-type="string">
            <text:p>https://www.uneiaparjour.fr/our-stories/</text:p>
          </table:table-cell>
          <table:table-cell office:value-type="string">
            <text:p>histoires enfants</text:p>
          </table:table-cell>
          <table:table-cell office:value-type="string">
            <text:p>langues</text:p>
          </table:table-cell>
          <table:table-cell office:value-type="string">
            <text:p>sans compte</text:p>
          </table:table-cell>
          <table:table-cell office:value-type="string">
            <text:p>texte</text:p>
          </table:table-cell>
          <table:table-cell office:value-type="string">
            <text:p>usage illimité</text:p>
          </table:table-cell>
          <table:table-cell office:value-type="string">
            <text:p>voix</text:p>
          </table:table-cell>
          <table:table-cell office:value-type="string">
            <text:p>24/05/2026</text:p>
          </table:table-cell>
        </table:table-row>
        <table:table-row>
          <table:table-cell office:value-type="string">
            <text:p>Vibeknow</text:p>
          </table:table-cell>
          <table:table-cell office:value-type="string">
            <text:p>Vibeknow (https://vibeknow.ai/) convertit des documents et des pages web en vidéos avec narration et musique de fond.</text:p>
          </table:table-cell>
          <table:table-cell office:value-type="string">
            <text:p>https://www.uneiaparjour.fr/vibeknow/</text:p>
          </table:table-cell>
          <table:table-cell office:value-type="string">
            <text:p>document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5/2026</text:p>
          </table:table-cell>
        </table:table-row>
        <table:table-row>
          <table:table-cell office:value-type="string">
            <text:p>Mixboard</text:p>
          </table:table-cell>
          <table:table-cell office:value-type="string">
            <text:p>Mixboard (https://labs.google.com/mixboard/) génère des tableaux de conception visuels depuis une instruction, sur un tableau blanc alimenté au fil des échanges avec l’IA.</text:p>
          </table:table-cell>
          <table:table-cell office:value-type="string">
            <text:p>https://www.uneiaparjour.fr/mixboard/</text:p>
          </table:table-cell>
          <table:table-cell office:value-type="string">
            <text:p>chatbot</text:p>
          </table:table-cell>
          <table:table-cell office:value-type="string">
            <text:p>images</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21/05/2026</text:p>
          </table:table-cell>
        </table:table-row>
        <table:table-row>
          <table:table-cell office:value-type="string">
            <text:p>Pixal3D</text:p>
          </table:table-cell>
          <table:table-cell office:value-type="string">
            <text:p>Pixal3D (quatre serveurs disponibles : https://huggingface.co/spaces/TencentARC/Pixal3D-Server et documentation : https://github.com/TencentARC/Pixal3D) génère un modèle 3D haute qualité depuis une image importée.</text:p>
          </table:table-cell>
          <table:table-cell office:value-type="string">
            <text:p>https://www.uneiaparjour.fr/pixal3d/</text:p>
          </table:table-cell>
          <table:table-cell office:value-type="string">
            <text:p>images 3D</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5/2026</text:p>
          </table:table-cell>
        </table:table-row>
        <table:table-row>
          <table:table-cell office:value-type="string">
            <text:p>SlideScript</text:p>
          </table:table-cell>
          <table:table-cell office:value-type="string">
            <text:p>SlideScript (https://www.slidescript.live/) génère les notes d’une présentation à partir d’un fichier pdf ou ppt.</text:p>
          </table:table-cell>
          <table:table-cell office:value-type="string">
            <text:p>https://www.uneiaparjour.fr/slidescript/</text:p>
          </table:table-cell>
          <table:table-cell office:value-type="string">
            <text:p>documents</text:p>
          </table:table-cell>
          <table:table-cell office:value-type="string">
            <text:p>présent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19/05/2026</text:p>
          </table:table-cell>
        </table:table-row>
        <table:table-row>
          <table:table-cell office:value-type="string">
            <text:p>Saveto</text:p>
          </table:table-cell>
          <table:table-cell office:value-type="string">
            <text:p>Saveto AI (https://saveto.ai/) regroupe plusieurs outils pour transcrire, résumer, transformer vidéos, fichiers audio et documents mais aussi générer podcast, infographies ouflashcards.</text:p>
          </table:table-cell>
          <table:table-cell office:value-type="string">
            <text:p>https://www.uneiaparjour.fr/saveto/</text:p>
          </table:table-cell>
          <table:table-cell office:value-type="string">
            <text:p>documents</text:p>
          </table:table-cell>
          <table:table-cell office:value-type="string">
            <text:p>infographie</text:p>
          </table:table-cell>
          <table:table-cell office:value-type="string">
            <text:p>mindmap</text:p>
          </table:table-cell>
          <table:table-cell office:value-type="string">
            <text:p>présentation</text:p>
          </table:table-cell>
          <table:table-cell office:value-type="string">
            <text:p>quiz et flashcards</text:p>
          </table:table-cell>
          <table:table-cell office:value-type="string">
            <text:p>usage illimité</text:p>
          </table:table-cell>
          <table:table-cell office:value-type="string">
            <text:p>18/05/2026</text:p>
          </table:table-cell>
        </table:table-row>
        <table:table-row>
          <table:table-cell office:value-type="string">
            <text:p>Nodalist</text:p>
          </table:table-cell>
          <table:table-cell office:value-type="string">
            <text:p>Nodalist AI (https://nodalist.ai/) construit une carte basée sur la réflexion autour d’un sujet donné où chaque idée devient un nœud et où plusieurs modèles de langage peuvent débattre en temps réel sur un sujet de la carte.</text:p>
          </table:table-cell>
          <table:table-cell office:value-type="string">
            <text:p>https://www.uneiaparjour.fr/nodalist/</text:p>
          </table:table-cell>
          <table:table-cell office:value-type="string">
            <text:p>LLM</text:p>
          </table:table-cell>
          <table:table-cell office:value-type="string">
            <text:p>mindma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7/05/2026</text:p>
          </table:table-cell>
        </table:table-row>
        <table:table-row>
          <table:table-cell office:value-type="string">
            <text:p>Hum2song</text:p>
          </table:table-cell>
          <table:table-cell office:value-type="string">
            <text:p>Hum2Song (https://www.carlostoxtli.com/hum2song/, documentation : https://github.com/toxtli/hum2song) génère un accompagnement musical à partir d’une mélodie fredonnée ou chantée.</text:p>
          </table:table-cell>
          <table:table-cell office:value-type="string">
            <text:p>https://www.uneiaparjour.fr/hum2song/</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16/05/2026</text:p>
          </table:table-cell>
        </table:table-row>
        <table:table-row>
          <table:table-cell office:value-type="string">
            <text:p>CompaRAG</text:p>
          </table:table-cell>
          <table:table-cell office:value-type="string">
            <text:p>CompaRAG (https://comparag.vercel.app/, description : https://www.linkedin.com/pulse/au-coeur-du-premier-comparateur-doutils-rag-fran%C3%A7ais-la-sarazin-phd-rhdje/ et documentation : https://github.com/ArthurSrz/CompaRAG/) compare des outils RAG à l’aveugle à partir d’une instruction et de documents soumis par l’utilisateur.Le RAG pour « retrieval-augmented generation » permet d’améliorer la q.ualité d’une réponse en ajouter des ressources complémentaires, voir Wikipedia.</text:p>
          </table:table-cell>
          <table:table-cell office:value-type="string">
            <text:p>https://www.uneiaparjour.fr/comparag/</text:p>
          </table:table-cell>
          <table:table-cell office:value-type="string">
            <text:p>FR / EU</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5/05/2026</text:p>
          </table:table-cell>
        </table:table-row>
        <table:table-row>
          <table:table-cell office:value-type="string">
            <text:p>Brik</text:p>
          </table:table-cell>
          <table:table-cell office:value-type="string">
            <text:p>Brik (https://brik.space/) génère des mini-applications interactives, entre mini-jeu et motion design, à partir d’une instruction.</text:p>
          </table:table-cell>
          <table:table-cell office:value-type="string">
            <text:p>https://www.uneiaparjour.fr/brik/</text:p>
          </table:table-cell>
          <table:table-cell office:value-type="string">
            <text:p>application</text:p>
          </table:table-cell>
          <table:table-cell office:value-type="string">
            <text:p>image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4/05/2026</text:p>
          </table:table-cell>
        </table:table-row>
        <table:table-row>
          <table:table-cell office:value-type="string">
            <text:p>Tokemon</text:p>
          </table:table-cell>
          <table:table-cell office:value-type="string">
            <text:p>Tokemon (https://tokemonlabs.com/ et documentation : https://github.com/leejustin/tokemon) présente 30 modèles de langage d’IA sous forme d’un Pokédex (voir sur Wikipedia) avec fiches de statistiques, types, chaînes d’évolution et combats simulés.L’ensemble est basé sur les codes du jeu Pokemon, Toekmon est un peu comme un Compar:IA Pokemon en pixel art.</text:p>
          </table:table-cell>
          <table:table-cell office:value-type="string">
            <text:p>https://www.uneiaparjour.fr/tokemon/</text:p>
          </table:table-cell>
          <table:table-cell office:value-type="string">
            <text:p>jeu vidéo</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3/05/2026</text:p>
          </table:table-cell>
        </table:table-row>
        <table:table-row>
          <table:table-cell office:value-type="string">
            <text:p>Linto Studio</text:p>
          </table:table-cell>
          <table:table-cell office:value-type="string">
            <text:p>LinTO Studio (https://studio.linto.ai/ et documentation : https://github.com/linto-ai) transcrit et génère des sous-titres à partir de fichiers audio ou vidéo.</text:p>
          </table:table-cell>
          <table:table-cell office:value-type="string">
            <text:p>https://www.uneiaparjour.fr/linto-studio/</text:p>
          </table:table-cell>
          <table:table-cell office:value-type="string">
            <text:p>FR / EU</text:p>
          </table:table-cell>
          <table:table-cell office:value-type="string">
            <text:p>open source</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12/05/2026</text:p>
          </table:table-cell>
        </table:table-row>
        <table:table-row>
          <table:table-cell office:value-type="string">
            <text:p>SciFig</text:p>
          </table:table-cell>
          <table:table-cell office:value-type="string">
            <text:p>SciFig (https://scifig.ai/) génère des figures scientifiques et des infographies à partir une instruction, un dessin ou un PDF ou une photo.</text:p>
          </table:table-cell>
          <table:table-cell office:value-type="string">
            <text:p>https://www.uneiaparjour.fr/scifig/</text:p>
          </table:table-cell>
          <table:table-cell office:value-type="string">
            <text:p>éducation</text:p>
          </table:table-cell>
          <table:table-cell office:value-type="string">
            <text:p>images</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11/05/2026</text:p>
          </table:table-cell>
        </table:table-row>
        <table:table-row>
          <table:table-cell office:value-type="string">
            <text:p>Open Maic</text:p>
          </table:table-cell>
          <table:table-cell office:value-type="string">
            <text:p>OpenMAIC (https://openmaic.io/, documentation : https://github.com/THU-MAIC/OpenMAIC, démo en ligne https://open.maic.chat/) génère des cours interactifs depuis une description de sujet ou un PDF importé, en orchestrant plusieurs agents IA.</text:p>
          </table:table-cell>
          <table:table-cell office:value-type="string">
            <text:p>https://www.uneiaparjour.fr/open-maic/</text:p>
          </table:table-cell>
          <table:table-cell office:value-type="string">
            <text:p>éducation</text:p>
          </table:table-cell>
          <table:table-cell office:value-type="string">
            <text:p>open sourc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10/05/2026</text:p>
          </table:table-cell>
        </table:table-row>
        <table:table-row>
          <table:table-cell office:value-type="string">
            <text:p>Friday</text:p>
          </table:table-cell>
          <table:table-cell office:value-type="string">
            <text:p>Friday (https://hellofriday.ai pour la version à installer et application en ligne : https://app.hellofriday.ai. Documentation : https://github.com/friday-platform/friday-studio) construit depuis des instructions dans un chatbot puis exécute des automatisations en mettent en place agents IA qui peuvent se lancer régulièrement.</text:p>
          </table:table-cell>
          <table:table-cell office:value-type="string">
            <text:p>https://www.uneiaparjour.fr/friday/</text:p>
          </table:table-cell>
          <table:table-cell office:value-type="string">
            <text:p>automatis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5/2026</text:p>
          </table:table-cell>
        </table:table-row>
        <table:table-row>
          <table:table-cell office:value-type="string">
            <text:p>Pomelli</text:p>
          </table:table-cell>
          <table:table-cell office:value-type="string">
            <text:p>Pomelli (https://labs.google.com/u/0/pomelli/) est un outil expérimental de Google Labs spécialisé dans la création de campagnes de communications à partir d’un site web.</text:p>
          </table:table-cell>
          <table:table-cell office:value-type="string">
            <text:p>https://www.uneiaparjour.fr/pomell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8/05/2026</text:p>
          </table:table-cell>
        </table:table-row>
        <table:table-row>
          <table:table-cell office:value-type="string">
            <text:p>Presenton</text:p>
          </table:table-cell>
          <table:table-cell office:value-type="string">
            <text:p>Presenton (https://presenton.ai/ — documentation : https://github.com/presenton/presenton) génère des présentations depuis une instruction ou un document importé.</text:p>
          </table:table-cell>
          <table:table-cell office:value-type="string">
            <text:p>https://www.uneiaparjour.fr/presenton/</text:p>
          </table:table-cell>
          <table:table-cell office:value-type="string">
            <text:p>open sourc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5/2026</text:p>
          </table:table-cell>
        </table:table-row>
        <table:table-row>
          <table:table-cell office:value-type="string">
            <text:p>Knowly</text:p>
          </table:table-cell>
          <table:table-cell office:value-type="string">
            <text:p>Knowly (https://goknowly.ai/) transforme des contenus sauvegardés ou un sujet saisi directement en parcours d’apprentissage : articles, PDF, vidéos et pages web sont organisés automatiquement en thèmes dans une bibliothèque et/ou organisés en « flows ».</text:p>
          </table:table-cell>
          <table:table-cell office:value-type="string">
            <text:p>https://www.uneiaparjour.fr/knowly/</text:p>
          </table:table-cell>
          <table:table-cell office:value-type="string">
            <text:p>documents</text:p>
          </table:table-cell>
          <table:table-cell office:value-type="string">
            <text:p>éducation</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6/05/2026</text:p>
          </table:table-cell>
        </table:table-row>
        <table:table-row>
          <table:table-cell office:value-type="string">
            <text:p>Replit slides</text:p>
          </table:table-cell>
          <table:table-cell office:value-type="string">
            <text:p>Replit slides (https://replit.com/slides) est un agent de Replit dédié à la génération de présentations.</text:p>
          </table:table-cell>
          <table:table-cell office:value-type="string">
            <text:p>https://www.uneiaparjour.fr/replit-slides/</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5/2026</text:p>
          </table:table-cell>
        </table:table-row>
        <table:table-row>
          <table:table-cell office:value-type="string">
            <text:p>Honen</text:p>
          </table:table-cell>
          <table:table-cell office:value-type="string">
            <text:p>Honen (https://honen.com/) génère des cours à partir d’une instruction et/ou d’un document support.</text:p>
          </table:table-cell>
          <table:table-cell office:value-type="string">
            <text:p>https://www.uneiaparjour.fr/honen/</text:p>
          </table:table-cell>
          <table:table-cell office:value-type="string">
            <text:p>bande dessinée</text:p>
          </table:table-cell>
          <table:table-cell office:value-type="string">
            <text:p>éducation</text:p>
          </table:table-cell>
          <table:table-cell office:value-type="string">
            <text:p>présentation</text:p>
          </table:table-cell>
          <table:table-cell office:value-type="string">
            <text:p>quiz et flashcards</text:p>
          </table:table-cell>
          <table:table-cell office:value-type="string">
            <text:p>texte</text:p>
          </table:table-cell>
          <table:table-cell office:value-type="string">
            <text:p>voix</text:p>
          </table:table-cell>
          <table:table-cell office:value-type="string">
            <text:p>04/05/2026</text:p>
          </table:table-cell>
        </table:table-row>
        <table:table-row>
          <table:table-cell office:value-type="string">
            <text:p>Soonlab</text:p>
          </table:table-cell>
          <table:table-cell office:value-type="string">
            <text:p>Soonlab (https://www.soonlab.ai/) génère des jeux vidéo à partir d’instructions.</text:p>
          </table:table-cell>
          <table:table-cell office:value-type="string">
            <text:p>https://www.uneiaparjour.fr/soonlab/</text:p>
          </table:table-cell>
          <table:table-cell office:value-type="string">
            <text:p>application</text:p>
          </table:table-cell>
          <table:table-cell office:value-type="string">
            <text:p>jeu 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5/2026</text:p>
          </table:table-cell>
        </table:table-row>
        <table:table-row>
          <table:table-cell office:value-type="string">
            <text:p>Tinfoil chat</text:p>
          </table:table-cell>
          <table:table-cell office:value-type="string">
            <text:p>Tinfoil chat (https://chat.tinfoil.sh/) est un chatbot annoncé comme sécurisé grace à un chiffrement des données de bout en bout, chaque conversation possèdant sa propre clé unique.</text:p>
          </table:table-cell>
          <table:table-cell office:value-type="string">
            <text:p>https://www.uneiaparjour.fr/tinfoil-chat/</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5/2026</text:p>
          </table:table-cell>
        </table:table-row>
        <table:table-row>
          <table:table-cell office:value-type="string">
            <text:p>Stanzio</text:p>
          </table:table-cell>
          <table:table-cell office:value-type="string">
            <text:p>Stanzio (https://stanzio.fly.dev/) génère des présentations à partir d ‘interactions dans un chatbot.</text:p>
          </table:table-cell>
          <table:table-cell office:value-type="string">
            <text:p>https://www.uneiaparjour.fr/stanzio/</text:p>
          </table:table-cell>
          <table:table-cell office:value-type="string">
            <text:p>présent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1/05/2026</text:p>
          </table:table-cell>
        </table:table-row>
        <table:table-row>
          <table:table-cell office:value-type="string">
            <text:p>FireRed Image-Edit</text:p>
          </table:table-cell>
          <table:table-cell office:value-type="string">
            <text:p>FireRed Image-Edit (Documentation : https://github.com/FireRedTeam/FireRed-Image-Edit et démonstration : https://huggingface.co/spaces/prithivMLmods/FireRed-Image-Edit-1.0-Fast) transforme une image à partir d’une instruction.</text:p>
          </table:table-cell>
          <table:table-cell office:value-type="string">
            <text:p>https://www.uneiaparjour.fr/firered-image-edit/</text:p>
          </table:table-cell>
          <table:table-cell office:value-type="string">
            <text:p>images</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30/04/2026</text:p>
          </table:table-cell>
        </table:table-row>
        <table:table-row>
          <table:table-cell office:value-type="string">
            <text:p>Echo 2</text:p>
          </table:table-cell>
          <table:table-cell office:value-type="string">
            <text:p>Echo 2 (https://spaitial.ai) génère des mondes en 3D et 360°, réalistes ou imaginaires, dans lesquels on peut se dépalcer, à partir d’une image importée ou générée directement dans l’application.</text:p>
          </table:table-cell>
          <table:table-cell office:value-type="string">
            <text:p>https://www.uneiaparjour.fr/echo-2/</text:p>
          </table:table-cell>
          <table:table-cell office:value-type="string">
            <text:p>images 3D</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29/04/2026</text:p>
          </table:table-cell>
        </table:table-row>
        <table:table-row>
          <table:table-cell office:value-type="string">
            <text:p>Happyhorse</text:p>
          </table:table-cell>
          <table:table-cell office:value-type="string">
            <text:p>Happyhorse (https://www.happyhorse.com) est le derniermodèle de génération de vidéos d’Alibaba.</text:p>
          </table:table-cell>
          <table:table-cell office:value-type="string">
            <text:p>https://www.uneiaparjour.fr/happyhorse/</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4/2026</text:p>
          </table:table-cell>
        </table:table-row>
        <table:table-row>
          <table:table-cell office:value-type="string">
            <text:p>12ui</text:p>
          </table:table-cell>
          <table:table-cell office:value-type="string">
            <text:p>12ui (https://12ui.com/) génère des interfaces web (HTML/CSS) à partir d’un dessin ou d’un schéma avec formes ou textes réalisé directement dans l’interface et/ou d’une instruction textuelle.</text:p>
          </table:table-cell>
          <table:table-cell office:value-type="string">
            <text:p>https://www.uneiaparjour.fr/12u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7/04/2026</text:p>
          </table:table-cell>
        </table:table-row>
        <table:table-row>
          <table:table-cell office:value-type="string">
            <text:p>Arky</text:p>
          </table:table-cell>
          <table:table-cell office:value-type="string">
            <text:p>Arky (https://arky.so/) est un espace de travail visuel style tableau blanc infini combiné à un chatbot pour structurer un projet ou des idées.</text:p>
          </table:table-cell>
          <table:table-cell office:value-type="string">
            <text:p>https://www.uneiaparjour.fr/arky/</text:p>
          </table:table-cell>
          <table:table-cell office:value-type="string">
            <text:p>chatbot</text:p>
          </table:table-cell>
          <table:table-cell office:value-type="string">
            <text:p>documents</text:p>
          </table:table-cell>
          <table:table-cell office:value-type="string">
            <text:p>mindmap</text:p>
          </table:table-cell>
          <table:table-cell office:value-type="string">
            <text:p>recherche</text:p>
          </table:table-cell>
          <table:table-cell office:value-type="string">
            <text:p>usage illimité</text:p>
          </table:table-cell>
          <table:table-cell office:value-type="string">
            <text:p/>
          </table:table-cell>
          <table:table-cell office:value-type="string">
            <text:p>26/04/2026</text:p>
          </table:table-cell>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