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Image to 3D AI</text:p>
          </table:table-cell>
          <table:table-cell office:value-type="string">
            <text:p>Image to 3D AI (https://image-to-3d.ai/) génère des modèles 3D à partir d’une image ou d’une instruction texte.</text:p>
          </table:table-cell>
          <table:table-cell office:value-type="string">
            <text:p>https://www.uneiaparjour.fr/image-to-3d-ai/</text:p>
          </table:table-cell>
          <table:table-cell office:value-type="string">
            <text:p>images 3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7/2026</text:p>
          </table:table-cell>
        </table:table-row>
        <table:table-row>
          <table:table-cell office:value-type="string">
            <text:p>Kyutai Pocket TTS</text:p>
          </table:table-cell>
          <table:table-cell office:value-type="string">
            <text:p>Kyutai Pocket TTS (https://kyutai.org/tts/ — documentation : https://github.com/kyutai-labs/pocket-tts) est un modèle open source de synthèse vocale.</text:p>
          </table:table-cell>
          <table:table-cell office:value-type="string">
            <text:p>https://www.uneiaparjour.fr/kyutai-pocket-t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0/07/2026</text:p>
          </table:table-cell>
        </table:table-row>
        <table:table-row>
          <table:table-cell office:value-type="string">
            <text:p>Assistant IA ÊtrePROF</text:p>
          </table:table-cell>
          <table:table-cell office:value-type="string">
            <text:p>L’Assistant IA ÊtrePROF (https://nouvel.etreprof.fr/preparer-seance-sequence) génère des des séances pédagogiques et une fiche professeur à partir d’une instruction rédigée sous forme d’informations choisies qui décrivent la séance, le niveau, la discipline et le profil de la classe (couvre la petite section à la terminale.)</text:p>
          </table:table-cell>
          <table:table-cell office:value-type="string">
            <text:p>https://www.uneiaparjour.fr/assistant-ia-etreprof/</text:p>
          </table:table-cell>
          <table:table-cell office:value-type="string">
            <text:p>éducation</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8/07/2026</text:p>
          </table:table-cell>
        </table:table-row>
        <table:table-row>
          <table:table-cell office:value-type="string">
            <text:p>Muse Image</text:p>
          </table:table-cell>
          <table:table-cell office:value-type="string">
            <text:p>Muse Image (https://www.meta.ai) génère et modifie des images à partir d’instructions en langage naturel, avec fusion de plusieurs photos et rendu de texte lisible dans l’image.</text:p>
          </table:table-cell>
          <table:table-cell office:value-type="string">
            <text:p>https://www.uneiaparjour.fr/muse-image/</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7/2026</text:p>
          </table:table-cell>
        </table:table-row>
        <table:table-row>
          <table:table-cell office:value-type="string">
            <text:p>ChecklistFox</text:p>
          </table:table-cell>
          <table:table-cell office:value-type="string">
            <text:p>ChecklistFox (https://checklistfox.com/) génère des checklists personnalisées à partir d’une instruction ou de modèles, exportables en PDF.</text:p>
          </table:table-cell>
          <table:table-cell office:value-type="string">
            <text:p>https://www.uneiaparjour.fr/checklistfox/</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7/2026</text:p>
          </table:table-cell>
        </table:table-row>
        <table:table-row>
          <table:table-cell office:value-type="string">
            <text:p>Bubul</text:p>
          </table:table-cell>
          <table:table-cell office:value-type="string">
            <text:p>Bubul (https://bubul.app/) propose huit outils IA destinés aux enseignants et formateurs :</text:p>
          </table:table-cell>
          <table:table-cell office:value-type="string">
            <text:p>https://www.uneiaparjour.fr/bubul/</text:p>
          </table:table-cell>
          <table:table-cell office:value-type="string">
            <text:p>éducation</text:p>
          </table:table-cell>
          <table:table-cell office:value-type="string">
            <text:p>FR / EU</text:p>
          </table:table-cell>
          <table:table-cell office:value-type="string">
            <text:p>images</text:p>
          </table:table-cell>
          <table:table-cell office:value-type="string">
            <text:p>présentation</text:p>
          </table:table-cell>
          <table:table-cell office:value-type="string">
            <text:p/>
          </table:table-cell>
          <table:table-cell office:value-type="string">
            <text:p/>
          </table:table-cell>
          <table:table-cell office:value-type="string">
            <text:p>06/07/2026</text:p>
          </table:table-cell>
        </table:table-row>
        <table:table-row>
          <table:table-cell office:value-type="string">
            <text:p>Briefed</text:p>
          </table:table-cell>
          <table:table-cell office:value-type="string">
            <text:p>Briefed (https://briefednewsletter.com/) génère une newsletter personnalisée par IA à partir d’une instruction.</text:p>
          </table:table-cell>
          <table:table-cell office:value-type="string">
            <text:p>https://www.uneiaparjour.fr/briefed/</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7/2026</text:p>
          </table:table-cell>
        </table:table-row>
        <table:table-row>
          <table:table-cell office:value-type="string">
            <text:p>Acti</text:p>
          </table:table-cell>
          <table:table-cell office:value-type="string">
            <text:p>Acti (https://openacti.com) transforme le clavier du téléphone en assistant IA : instruction en langage naturel, exécution d’actions dans les autres applications, bibliothèque de plus de 150 outils intégrés.</text:p>
          </table:table-cell>
          <table:table-cell office:value-type="string">
            <text:p>https://www.uneiaparjour.fr/acti/</text:p>
          </table:table-cell>
          <table:table-cell office:value-type="string">
            <text:p>automatisation</text:p>
          </table:table-cell>
          <table:table-cell office:value-type="string">
            <text:p>chatbot</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03/07/2026</text:p>
          </table:table-cell>
        </table:table-row>
        <table:table-row>
          <table:table-cell office:value-type="string">
            <text:p>LearnKata</text:p>
          </table:table-cell>
          <table:table-cell office:value-type="string">
            <text:p>LearnKata (https://learnkata.ai/) transforme une instruction ou des documents importés en supports d’apprentissage : résumés, quiz, flashcards et cartes mentales.</text:p>
          </table:table-cell>
          <table:table-cell office:value-type="string">
            <text:p>https://www.uneiaparjour.fr/learnkata/</text:p>
          </table:table-cell>
          <table:table-cell office:value-type="string">
            <text:p>éducation</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4/07/2026</text:p>
          </table:table-cell>
        </table:table-row>
        <table:table-row>
          <table:table-cell office:value-type="string">
            <text:p>Boogu Image</text:p>
          </table:table-cell>
          <table:table-cell office:value-type="string">
            <text:p>Boogu Image (http://demo-base.boogu.org et documentation : https://github.com/boogu-project/Boogu-Image) génère et édite des images à partir d’une instruction texte, avec rendu de texte intégré en français-anglais et en chinois.</text:p>
          </table:table-cell>
          <table:table-cell office:value-type="string">
            <text:p>https://www.uneiaparjour.fr/boogu-image/</text:p>
          </table:table-cell>
          <table:table-cell office:value-type="string">
            <text:p>images</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7/2026</text:p>
          </table:table-cell>
        </table:table-row>
        <table:table-row>
          <table:table-cell office:value-type="string">
            <text:p>Lumo 2.0</text:p>
          </table:table-cell>
          <table:table-cell office:value-type="string">
            <text:p>Lumo 2.0 (https://lumo.proton.me/) est la nouvelle version de Lumo, le chatbot de Proton qui génère du texte, analyse et génère des images, effectue une recherche web sourcée, et conserve une mémoire contrôlée par l’utilisateur, le tout chiffré de bout en bout.</text:p>
          </table:table-cell>
          <table:table-cell office:value-type="string">
            <text:p>https://www.uneiaparjour.fr/lumo-2-0/</text:p>
          </table:table-cell>
          <table:table-cell office:value-type="string">
            <text:p>chatbot</text:p>
          </table:table-cell>
          <table:table-cell office:value-type="string">
            <text:p>documents</text:p>
          </table:table-cell>
          <table:table-cell office:value-type="string">
            <text:p>FR / EU</text:p>
          </table:table-cell>
          <table:table-cell office:value-type="string">
            <text:p>images</text:p>
          </table:table-cell>
          <table:table-cell office:value-type="string">
            <text:p>sans compte</text:p>
          </table:table-cell>
          <table:table-cell office:value-type="string">
            <text:p>texte</text:p>
          </table:table-cell>
          <table:table-cell office:value-type="string">
            <text:p>01/07/2026</text:p>
          </table:table-cell>
        </table:table-row>
        <table:table-row>
          <table:table-cell office:value-type="string">
            <text:p>Pluno</text:p>
          </table:table-cell>
          <table:table-cell office:value-type="string">
            <text:p>Pluno (https://pluno.ai/browser) est une extension de navigateur qui exécute des tâches dircetement dans les pages web à partir d’une instruction.</text:p>
          </table:table-cell>
          <table:table-cell office:value-type="string">
            <text:p>https://www.uneiaparjour.fr/pluno/</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6/2026</text:p>
          </table:table-cell>
        </table:table-row>
        <table:table-row>
          <table:table-cell office:value-type="string">
            <text:p>Music0 AI</text:p>
          </table:table-cell>
          <table:table-cell office:value-type="string">
            <text:p>Music0 AI (https://music0.org/) génère des morceaux de musique et des clips vidéo depuis une instruction.</text:p>
          </table:table-cell>
          <table:table-cell office:value-type="string">
            <text:p>https://www.uneiaparjour.fr/music0-ai/</text:p>
          </table:table-cell>
          <table:table-cell office:value-type="string">
            <text:p>musique</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6/2026</text:p>
          </table:table-cell>
        </table:table-row>
        <table:table-row>
          <table:table-cell office:value-type="string">
            <text:p>Lolaby</text:p>
          </table:table-cell>
          <table:table-cell office:value-type="string">
            <text:p>Lolaby (https://huggingface.co/spaces/build-small-hackathon/lolaby et documentation : https://huggingface.co/build-small-hackathon/lolaby-llama-3b) génère des berceuses personnalisées à partir d’une image (dessin ou photo), du prénom, de l’âge et des centres d’intérêt d’un enfant.</text:p>
          </table:table-cell>
          <table:table-cell office:value-type="string">
            <text:p>https://www.uneiaparjour.fr/lolaby/</text:p>
          </table:table-cell>
          <table:table-cell office:value-type="string">
            <text:p>langues</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texte</text:p>
          </table:table-cell>
          <table:table-cell office:value-type="string">
            <text:p>voix</text:p>
          </table:table-cell>
          <table:table-cell office:value-type="string">
            <text:p>27/06/2026</text:p>
          </table:table-cell>
        </table:table-row>
        <table:table-row>
          <table:table-cell office:value-type="string">
            <text:p>Mistral OCR 4</text:p>
          </table:table-cell>
          <table:table-cell office:value-type="string">
            <text:p>Mistral OCR 4 (https://console.mistral.ai/build/document-ai/ocr-playground et documentation : https://docs.mistral.ai/models/model-cards/ocr-4-0) extrait et structure le contenu de documents.</text:p>
          </table:table-cell>
          <table:table-cell office:value-type="string">
            <text:p>https://www.uneiaparjour.fr/mistral-ocr-4/</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6/2026</text:p>
          </table:table-cell>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