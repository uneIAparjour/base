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Veritas Source</text:p>
          </table:table-cell>
          <table:table-cell office:value-type="string">
            <text:p>Veritas Source (https://veritas-source.com/) analyse une URL, un texte ou une image pour en évaluer la source : biais politique, propriétaire, financement, antécédents éditoriaux, et signes de génération par IA.</text:p>
          </table:table-cell>
          <table:table-cell office:value-type="string">
            <text:p>https://www.uneiaparjour.fr/veritas-source/</text:p>
          </table:table-cell>
          <table:table-cell office:value-type="string">
            <text:p>actualités et fact-checking</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9/06/2026</text:p>
          </table:table-cell>
        </table:table-row>
        <table:table-row>
          <table:table-cell office:value-type="string">
            <text:p>Swishy</text:p>
          </table:table-cell>
          <table:table-cell office:value-type="string">
            <text:p>Swishy (https://www.swishy.ai/) génère des animations motion design (typographies ou objets animés) depuis une instruction en langage naturel.</text:p>
          </table:table-cell>
          <table:table-cell office:value-type="string">
            <text:p>https://www.uneiaparjour.fr/swishy/</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8/06/2026</text:p>
          </table:table-cell>
        </table:table-row>
        <table:table-row>
          <table:table-cell office:value-type="string">
            <text:p>Clarify AI</text:p>
          </table:table-cell>
          <table:table-cell office:value-type="string">
            <text:p>Clarify AI (https://www.clarify-ai.com/) découpe une problèmatique en un arbre de sous-questions hiérarchisées, avec recherche web et export en texte structuré.</text:p>
          </table:table-cell>
          <table:table-cell office:value-type="string">
            <text:p>https://www.uneiaparjour.fr/clarify-ai/</text:p>
          </table:table-cell>
          <table:table-cell office:value-type="string">
            <text:p>mindmap</text:p>
          </table:table-cell>
          <table:table-cell office:value-type="string">
            <text:p>recherche</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17/06/2026</text:p>
          </table:table-cell>
        </table:table-row>
        <table:table-row>
          <table:table-cell office:value-type="string">
            <text:p>Drafted</text:p>
          </table:table-cell>
          <table:table-cell office:value-type="string">
            <text:p>Drafted (https://www.drafted.ai/) génère des plans de maison à partir d’une liste de pièces, d’une forme de terrain et un style.</text:p>
          </table:table-cell>
          <table:table-cell office:value-type="string">
            <text:p>https://www.uneiaparjour.fr/drafted/</text:p>
          </table:table-cell>
          <table:table-cell office:value-type="string">
            <text:p>images</text:p>
          </table:table-cell>
          <table:table-cell office:value-type="string">
            <text:p>images 3D</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6/06/2026</text:p>
          </table:table-cell>
        </table:table-row>
        <table:table-row>
          <table:table-cell office:value-type="string">
            <text:p>ManualFig</text:p>
          </table:table-cell>
          <table:table-cell office:value-type="string">
            <text:p>ManualFig (https://manualfig.ai/) transforme une photo en notice de montage, mode d’emploi ou schéma d’utilisation à partir d’une image et d’une isntruction.</text:p>
          </table:table-cell>
          <table:table-cell office:value-type="string">
            <text:p>https://www.uneiaparjour.fr/manualfig/</text:p>
          </table:table-cell>
          <table:table-cell office:value-type="string">
            <text:p>images</text:p>
          </table:table-cell>
          <table:table-cell office:value-type="string">
            <text:p>tutorie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5/06/2026</text:p>
          </table:table-cell>
        </table:table-row>
        <table:table-row>
          <table:table-cell office:value-type="string">
            <text:p>Happycapy</text:p>
          </table:table-cell>
          <table:table-cell office:value-type="string">
            <text:p>Happycapy (https://happycapy.ai/) est un chatbot avec des agents IA pour exécuter dans le navigateur des tâches à la place de l’utilisateur.</text:p>
          </table:table-cell>
          <table:table-cell office:value-type="string">
            <text:p>https://www.uneiaparjour.fr/happycapy/</text:p>
          </table:table-cell>
          <table:table-cell office:value-type="string">
            <text:p>chatbot</text:p>
          </table:table-cell>
          <table:table-cell office:value-type="string">
            <text:p>documents</text:p>
          </table:table-cell>
          <table:table-cell office:value-type="string">
            <text:p>images</text:p>
          </table:table-cell>
          <table:table-cell office:value-type="string">
            <text:p>présentation</text:p>
          </table:table-cell>
          <table:table-cell office:value-type="string">
            <text:p>recherche</text:p>
          </table:table-cell>
          <table:table-cell office:value-type="string">
            <text:p/>
          </table:table-cell>
          <table:table-cell office:value-type="string">
            <text:p>14/06/2026</text:p>
          </table:table-cell>
        </table:table-row>
        <table:table-row>
          <table:table-cell office:value-type="string">
            <text:p>PDFFly PDF summarizer</text:p>
          </table:table-cell>
          <table:table-cell office:value-type="string">
            <text:p>PDFFly (https://pdffly.com/pdf-summarizer) génère un résumé structuré depuis un PDF importé et permet d’interroger le document via un chatbot.</text:p>
          </table:table-cell>
          <table:table-cell office:value-type="string">
            <text:p>https://www.uneiaparjour.fr/pdffly-pdf-summarizer/</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3/06/2026</text:p>
          </table:table-cell>
        </table:table-row>
        <table:table-row>
          <table:table-cell office:value-type="string">
            <text:p>Inkfox AI</text:p>
          </table:table-cell>
          <table:table-cell office:value-type="string">
            <text:p>Inkfox AI (https://inkfox.app/) génère des images et des vidéos par instruction, sans inscription nécessaire.</text:p>
          </table:table-cell>
          <table:table-cell office:value-type="string">
            <text:p>https://www.uneiaparjour.fr/inkfox-ai/</text:p>
          </table:table-cell>
          <table:table-cell office:value-type="string">
            <text:p>images</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2/06/2026</text:p>
          </table:table-cell>
        </table:table-row>
        <table:table-row>
          <table:table-cell office:value-type="string">
            <text:p>Lium</text:p>
          </table:table-cell>
          <table:table-cell office:value-type="string">
            <text:p>Lium (https://www.lium.ai/) connecte des sources de données complexes (bases, fichiers, API…) et répond en langage naturel par des analyses, scripts ou outils générés par IA.</text:p>
          </table:table-cell>
          <table:table-cell office:value-type="string">
            <text:p>https://www.uneiaparjour.fr/lium/</text:p>
          </table:table-cell>
          <table:table-cell office:value-type="string">
            <text:p>chatbot</text:p>
          </table:table-cell>
          <table:table-cell office:value-type="string">
            <text:p>donné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1/06/2026</text:p>
          </table:table-cell>
        </table:table-row>
        <table:table-row>
          <table:table-cell office:value-type="string">
            <text:p>ChordGen</text:p>
          </table:table-cell>
          <table:table-cell office:value-type="string">
            <text:p>ChordGen (https://www.chordgen.org/) génère des progressions d’accords à partir d’une instruction décrivant une ambiance ou un genre musical et un nombre d’accords.</text:p>
          </table:table-cell>
          <table:table-cell office:value-type="string">
            <text:p>https://www.uneiaparjour.fr/chordgen/</text:p>
          </table:table-cell>
          <table:table-cell office:value-type="string">
            <text:p>musiqu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0/06/2026</text:p>
          </table:table-cell>
        </table:table-row>
        <table:table-row>
          <table:table-cell office:value-type="string">
            <text:p>Open Paper</text:p>
          </table:table-cell>
          <table:table-cell office:value-type="string">
            <text:p>Open Paper (application : https://openpaper.ai/ et documentation : https://github.com/khoj-ai/openpaper) permet de lire, annoter et interroger des articles de recherche académique.</text:p>
          </table:table-cell>
          <table:table-cell office:value-type="string">
            <text:p>https://www.uneiaparjour.fr/open-paper/</text:p>
          </table:table-cell>
          <table:table-cell office:value-type="string">
            <text:p>documents</text:p>
          </table:table-cell>
          <table:table-cell office:value-type="string">
            <text:p>open source</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9/06/2026</text:p>
          </table:table-cell>
        </table:table-row>
        <table:table-row>
          <table:table-cell office:value-type="string">
            <text:p>InfoBlog</text:p>
          </table:table-cell>
          <table:table-cell office:value-type="string">
            <text:p>InfoBlog (https://useinfoblog.com/) transforme des instruction et/ou documents en présentations, carrousels ou infographies éditables.</text:p>
          </table:table-cell>
          <table:table-cell office:value-type="string">
            <text:p>https://www.uneiaparjour.fr/infoblog/</text:p>
          </table:table-cell>
          <table:table-cell office:value-type="string">
            <text:p>images</text:p>
          </table:table-cell>
          <table:table-cell office:value-type="string">
            <text:p>infographi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08/06/2026</text:p>
          </table:table-cell>
        </table:table-row>
        <table:table-row>
          <table:table-cell office:value-type="string">
            <text:p>Is it Fake ?</text:p>
          </table:table-cell>
          <table:table-cell office:value-type="string">
            <text:p>Is it Fake ? (https://isitfake.app/) vérifie la crédibilité d’articles de presse via leur url.</text:p>
          </table:table-cell>
          <table:table-cell office:value-type="string">
            <text:p>https://www.uneiaparjour.fr/is-it-fake/</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6/2026</text:p>
          </table:table-cell>
        </table:table-row>
        <table:table-row>
          <table:table-cell office:value-type="string">
            <text:p>Arena</text:p>
          </table:table-cell>
          <table:table-cell office:value-type="string">
            <text:p>Arena (https://arena.ai/) est la version commerciale de Chatbot Arena, relancée en janvier 2026 sous un nouveau nom et une nouvelle URL, avec des fonctionnalités étendues. Le site est également accessible sur HuggingFace (https://huggingface.co/lmarena-ai).</text:p>
          </table:table-cell>
          <table:table-cell office:value-type="string">
            <text:p>https://www.uneiaparjour.fr/arena/</text:p>
          </table:table-cell>
          <table:table-cell office:value-type="string">
            <text:p>chatbot</text:p>
          </table:table-cell>
          <table:table-cell office:value-type="string">
            <text:p>documents</text:p>
          </table:table-cell>
          <table:table-cell office:value-type="string">
            <text:p>images</text:p>
          </table:table-cell>
          <table:table-cell office:value-type="string">
            <text:p>LLM</text:p>
          </table:table-cell>
          <table:table-cell office:value-type="string">
            <text:p>texte</text:p>
          </table:table-cell>
          <table:table-cell office:value-type="string">
            <text:p>usage illimité</text:p>
          </table:table-cell>
          <table:table-cell office:value-type="string">
            <text:p>06/06/2026</text:p>
          </table:table-cell>
        </table:table-row>
        <table:table-row>
          <table:table-cell office:value-type="string">
            <text:p>PDF to Lesson</text:p>
          </table:table-cell>
          <table:table-cell office:value-type="string">
            <text:p>PDF to Lesson (https://www.pdftolesson.com/ — documentation : https://github.com/Nutlope/pdf-to-interactive-lesson) transforme un document PDF en cours interactif structuré en modules.</text:p>
          </table:table-cell>
          <table:table-cell office:value-type="string">
            <text:p>https://www.uneiaparjour.fr/pdf-to-lesson/</text:p>
          </table:table-cell>
          <table:table-cell office:value-type="string">
            <text:p>documents</text:p>
          </table:table-cell>
          <table:table-cell office:value-type="string">
            <text:p>éduc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05/06/2026</text:p>
          </table:table-cell>
        </table:table-row>
        <table:table-row>
          <table:table-cell office:value-type="string">
            <text:p>MAI Playground</text:p>
          </table:table-cell>
          <table:table-cell office:value-type="string">
            <text:p>MAI Playground (https://playground.microsoft.ai/) donne accès aux modèles IA de Microsoft : génération d’images, transcription audio, synthèse vocale et conversation multimodale.</text:p>
          </table:table-cell>
          <table:table-cell office:value-type="string">
            <text:p>https://www.uneiaparjour.fr/mai-playground/</text:p>
          </table:table-cell>
          <table:table-cell office:value-type="string">
            <text:p>images</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04/06/2026</text:p>
          </table:table-cell>
        </table:table-row>
        <table:table-row>
          <table:table-cell office:value-type="string">
            <text:p>Overline</text:p>
          </table:table-cell>
          <table:table-cell office:value-type="string">
            <text:p>Overline (https://overline.live/) est une extension Chrome qui ajoute des sous-titres en temps réel et une traduction en direct en superposition sur n’importe quelle vidéo du navigateur, sans fichier de sous-titres et sans changer d’onglet.</text:p>
          </table:table-cell>
          <table:table-cell office:value-type="string">
            <text:p>https://www.uneiaparjour.fr/overline/</text:p>
          </table:table-cell>
          <table:table-cell office:value-type="string">
            <text:p>langu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6/2026</text:p>
          </table:table-cell>
        </table:table-row>
        <table:table-row>
          <table:table-cell office:value-type="string">
            <text:p>WorkInProcess</text:p>
          </table:table-cell>
          <table:table-cell office:value-type="string">
            <text:p>WorkInProcess (https://workinprocess.app/) est un studio d’édition d’images en ligne dont les modèles IA s’exécutent entièrement dans le navigateur, sans envoi de fichiers vers un serveur.</text:p>
          </table:table-cell>
          <table:table-cell office:value-type="string">
            <text:p>https://www.uneiaparjour.fr/workinprocess/</text:p>
          </table:table-cell>
          <table:table-cell office:value-type="string">
            <text:p>image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02/06/2026</text:p>
          </table:table-cell>
        </table:table-row>
        <table:table-row>
          <table:table-cell office:value-type="string">
            <text:p>DocsToAudio</text:p>
          </table:table-cell>
          <table:table-cell office:value-type="string">
            <text:p>DocsToAudio (https://docstoaudio.online/) convertit des fichiers pdf, epub, docx et txt en audio MP3 ou M4B avec 300 voix IA dans 50 langues disponibles (13 francophones dont 5 françaises)</text:p>
          </table:table-cell>
          <table:table-cell office:value-type="string">
            <text:p>https://www.uneiaparjour.fr/docstoaudio/</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01/06/2026</text:p>
          </table:table-cell>
        </table:table-row>
        <table:table-row>
          <table:table-cell office:value-type="string">
            <text:p>Explainpaper</text:p>
          </table:table-cell>
          <table:table-cell office:value-type="string">
            <text:p>Explainpaper (https://www.explainpaper.com/) explique les passages difficiles d’un fichier pdf.Orienté artciles de recherche mais fonctionne avec tout pdf.</text:p>
          </table:table-cell>
          <table:table-cell office:value-type="string">
            <text:p>https://www.uneiaparjour.fr/explainpaper/</text:p>
          </table:table-cell>
          <table:table-cell office:value-type="string">
            <text:p>documents</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5/2026</text:p>
          </table:table-cell>
        </table:table-row>
        <table:table-row>
          <table:table-cell office:value-type="string">
            <text:p>HappySeeds</text:p>
          </table:table-cell>
          <table:table-cell office:value-type="string">
            <text:p>HappySeeds (https://happyseeds.ai) génère des applications web à partir d’une instruction.</text:p>
          </table:table-cell>
          <table:table-cell office:value-type="string">
            <text:p>https://www.uneiaparjour.fr/happyseeds/</text:p>
          </table:table-cell>
          <table:table-cell office:value-type="string">
            <text:p>applic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1/05/2026</text:p>
          </table:table-cell>
        </table:table-row>
        <table:table-row>
          <table:table-cell office:value-type="string">
            <text:p>MeshGPT</text:p>
          </table:table-cell>
          <table:table-cell office:value-type="string">
            <text:p>MeshGPT (https://meshgpt.io/) génère des modèles 3D à partir d’une instruction texte ou d’une image.</text:p>
          </table:table-cell>
          <table:table-cell office:value-type="string">
            <text:p>https://www.uneiaparjour.fr/meshgpt/</text:p>
          </table:table-cell>
          <table:table-cell office:value-type="string">
            <text:p>images 3D</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5/2026</text:p>
          </table:table-cell>
        </table:table-row>
        <table:table-row>
          <table:table-cell office:value-type="string">
            <text:p>MindChat World</text:p>
          </table:table-cell>
          <table:table-cell office:value-type="string">
            <text:p>MindChat World (https://mindchat.world/fr/) permet de converser par écrit avec des personnages historiques simulés dans un chatbot : écrivains, philosophes et scientifiques.</text:p>
          </table:table-cell>
          <table:table-cell office:value-type="string">
            <text:p>https://www.uneiaparjour.fr/mindchat-world/</text:p>
          </table:table-cell>
          <table:table-cell office:value-type="string">
            <text:p>chatbot</text:p>
          </table:table-cell>
          <table:table-cell office:value-type="string">
            <text:p>FR / EU</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5/2026</text:p>
          </table:table-cell>
        </table:table-row>
        <table:table-row>
          <table:table-cell office:value-type="string">
            <text:p>Ecosia</text:p>
          </table:table-cell>
          <table:table-cell office:value-type="string">
            <text:p>Ecosia (https://www.ecosia.org) est un moteur de recherche, basé sur Bing, Google et Qwant, à but non lucratif dont les profits issus de la publicité, financent des projets de reforestation et d’energie renouvelables.Intègre deux fonctionnalités IA : des résumés générés (AI Overviews) et un mode conversationnel (Chat IA).</text:p>
          </table:table-cell>
          <table:table-cell office:value-type="string">
            <text:p>https://www.uneiaparjour.fr/ecosia/</text:p>
          </table:table-cell>
          <table:table-cell office:value-type="string">
            <text:p>FR / EU</text:p>
          </table:table-cell>
          <table:table-cell office:value-type="string">
            <text:p>recherch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7/05/2026</text:p>
          </table:table-cell>
        </table:table-row>
        <table:table-row>
          <table:table-cell office:value-type="string">
            <text:p>Stable Audio 3</text:p>
          </table:table-cell>
          <table:table-cell office:value-type="string">
            <text:p>Stable Audio 3 (https://huggingface.co/collections/stabilityai/stable-audio-3) est la nouvelle version du modèle de génération de musique de la famille Stable Audio déjà vue par ici. Open source pour 3 de ses 4 variantes, génère des morceaux de musique instrumentale et des effets sonores depuis une instruction, avec des sons / musiques pouvant être ajoutés comme repères.</text:p>
          </table:table-cell>
          <table:table-cell office:value-type="string">
            <text:p>https://www.uneiaparjour.fr/stable-audio-3/</text:p>
          </table:table-cell>
          <table:table-cell office:value-type="string">
            <text:p>musique</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5/2026</text:p>
          </table:table-cell>
        </table:table-row>
        <table:table-row>
          <table:table-cell office:value-type="string">
            <text:p>CartoMind</text:p>
          </table:table-cell>
          <table:table-cell office:value-type="string">
            <text:p>CartoMind (https://cartomind.ai/) génère des infographies à partir d’une instruction, d’un texte collé ou d’un document importé (md, pdf, txt, doc).</text:p>
          </table:table-cell>
          <table:table-cell office:value-type="string">
            <text:p>https://www.uneiaparjour.fr/cartomind/</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5/05/2026</text:p>
          </table:table-cell>
        </table:table-row>
        <table:table-row>
          <table:table-cell office:value-type="string">
            <text:p>Dim0</text:p>
          </table:table-cell>
          <table:table-cell office:value-type="string">
            <text:p>Dim0 (https://app.dim0.net et documentation : https://github.com/vcmf/dim0) est un tableau infini qui peut être rempli avec des documens, des notes, du code ou des schémas avec un agent IA intégré et organisé sous forme de cartes heuristiques.</text:p>
          </table:table-cell>
          <table:table-cell office:value-type="string">
            <text:p>https://www.uneiaparjour.fr/dim0/</text:p>
          </table:table-cell>
          <table:table-cell office:value-type="string">
            <text:p>mindmap</text:p>
          </table:table-cell>
          <table:table-cell office:value-type="string">
            <text:p>open source</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23/05/2026</text:p>
          </table:table-cell>
        </table:table-row>
        <table:table-row>
          <table:table-cell office:value-type="string">
            <text:p>Our stories</text:p>
          </table:table-cell>
          <table:table-cell office:value-type="string">
            <text:p>Our Stories (https://readourstories.org/) génère des histoires pour enfants à partir d’une instruction.</text:p>
          </table:table-cell>
          <table:table-cell office:value-type="string">
            <text:p>https://www.uneiaparjour.fr/our-stories/</text:p>
          </table:table-cell>
          <table:table-cell office:value-type="string">
            <text:p>histoires enfants</text:p>
          </table:table-cell>
          <table:table-cell office:value-type="string">
            <text:p>langues</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voix</text:p>
          </table:table-cell>
          <table:table-cell office:value-type="string">
            <text:p>24/05/2026</text:p>
          </table:table-cell>
        </table:table-row>
        <table:table-row>
          <table:table-cell office:value-type="string">
            <text:p>Vibeknow</text:p>
          </table:table-cell>
          <table:table-cell office:value-type="string">
            <text:p>Vibeknow (https://vibeknow.ai/) convertit des documents et des pages web en vidéos avec narration et musique de fond.</text:p>
          </table:table-cell>
          <table:table-cell office:value-type="string">
            <text:p>https://www.uneiaparjour.fr/vibeknow/</text:p>
          </table:table-cell>
          <table:table-cell office:value-type="string">
            <text:p>document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5/2026</text:p>
          </table:table-cell>
        </table:table-row>
        <table:table-row>
          <table:table-cell office:value-type="string">
            <text:p>Mixboard</text:p>
          </table:table-cell>
          <table:table-cell office:value-type="string">
            <text:p>Mixboard (https://labs.google.com/mixboard/) génère des tableaux de conception visuels depuis une instruction, sur un tableau blanc alimenté au fil des échanges avec l’IA.</text:p>
          </table:table-cell>
          <table:table-cell office:value-type="string">
            <text:p>https://www.uneiaparjour.fr/mixboard/</text:p>
          </table:table-cell>
          <table:table-cell office:value-type="string">
            <text:p>chatbot</text:p>
          </table:table-cell>
          <table:table-cell office:value-type="string">
            <text:p>images</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21/05/2026</text:p>
          </table:table-cell>
        </table:table-row>
        <table:table-row>
          <table:table-cell office:value-type="string">
            <text:p>Pixal3D</text:p>
          </table:table-cell>
          <table:table-cell office:value-type="string">
            <text:p>Pixal3D (quatre serveurs disponibles : https://huggingface.co/spaces/TencentARC/Pixal3D-Server et documentation : https://github.com/TencentARC/Pixal3D) génère un modèle 3D haute qualité depuis une image importée.</text:p>
          </table:table-cell>
          <table:table-cell office:value-type="string">
            <text:p>https://www.uneiaparjour.fr/pixal3d/</text:p>
          </table:table-cell>
          <table:table-cell office:value-type="string">
            <text:p>images 3D</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5/2026</text:p>
          </table:table-cell>
        </table:table-row>
        <table:table-row>
          <table:table-cell office:value-type="string">
            <text:p>SlideScript</text:p>
          </table:table-cell>
          <table:table-cell office:value-type="string">
            <text:p>SlideScript (https://www.slidescript.live/) génère les notes d’une présentation à partir d’un fichier pdf ou ppt.</text:p>
          </table:table-cell>
          <table:table-cell office:value-type="string">
            <text:p>https://www.uneiaparjour.fr/slidescript/</text:p>
          </table:table-cell>
          <table:table-cell office:value-type="string">
            <text:p>documents</text:p>
          </table:table-cell>
          <table:table-cell office:value-type="string">
            <text:p>présent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19/05/2026</text:p>
          </table:table-cell>
        </table:table-row>
        <table:table-row>
          <table:table-cell office:value-type="string">
            <text:p>Saveto</text:p>
          </table:table-cell>
          <table:table-cell office:value-type="string">
            <text:p>Saveto AI (https://saveto.ai/) regroupe plusieurs outils pour transcrire, résumer, transformer vidéos, fichiers audio et documents mais aussi générer podcast, infographies ouflashcards.</text:p>
          </table:table-cell>
          <table:table-cell office:value-type="string">
            <text:p>https://www.uneiaparjour.fr/saveto/</text:p>
          </table:table-cell>
          <table:table-cell office:value-type="string">
            <text:p>documents</text:p>
          </table:table-cell>
          <table:table-cell office:value-type="string">
            <text:p>infographie</text:p>
          </table:table-cell>
          <table:table-cell office:value-type="string">
            <text:p>mindmap</text:p>
          </table:table-cell>
          <table:table-cell office:value-type="string">
            <text:p>présentation</text:p>
          </table:table-cell>
          <table:table-cell office:value-type="string">
            <text:p>quiz et flashcards</text:p>
          </table:table-cell>
          <table:table-cell office:value-type="string">
            <text:p>usage illimité</text:p>
          </table:table-cell>
          <table:table-cell office:value-type="string">
            <text:p>18/05/2026</text:p>
          </table:table-cell>
        </table:table-row>
        <table:table-row>
          <table:table-cell office:value-type="string">
            <text:p>Nodalist</text:p>
          </table:table-cell>
          <table:table-cell office:value-type="string">
            <text:p>Nodalist AI (https://nodalist.ai/) construit une carte basée sur la réflexion autour d’un sujet donné où chaque idée devient un nœud et où plusieurs modèles de langage peuvent débattre en temps réel sur un sujet de la carte.</text:p>
          </table:table-cell>
          <table:table-cell office:value-type="string">
            <text:p>https://www.uneiaparjour.fr/nodalist/</text:p>
          </table:table-cell>
          <table:table-cell office:value-type="string">
            <text:p>LLM</text:p>
          </table:table-cell>
          <table:table-cell office:value-type="string">
            <text:p>mindm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7/05/2026</text:p>
          </table:table-cell>
        </table:table-row>
        <table:table-row>
          <table:table-cell office:value-type="string">
            <text:p>Hum2song</text:p>
          </table:table-cell>
          <table:table-cell office:value-type="string">
            <text:p>Hum2Song (https://www.carlostoxtli.com/hum2song/, documentation : https://github.com/toxtli/hum2song) génère un accompagnement musical à partir d’une mélodie fredonnée ou chantée.</text:p>
          </table:table-cell>
          <table:table-cell office:value-type="string">
            <text:p>https://www.uneiaparjour.fr/hum2song/</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16/05/2026</text:p>
          </table:table-cell>
        </table:table-row>
        <table:table-row>
          <table:table-cell office:value-type="string">
            <text:p>CompaRAG</text:p>
          </table:table-cell>
          <table:table-cell office:value-type="string">
            <text:p>CompaRAG (https://comparag.vercel.app/, description : https://www.linkedin.com/pulse/au-coeur-du-premier-comparateur-doutils-rag-fran%C3%A7ais-la-sarazin-phd-rhdje/ et documentation : https://github.com/ArthurSrz/CompaRAG/) compare des outils RAG à l’aveugle à partir d’une instruction et de documents soumis par l’utilisateur.Le RAG pour « retrieval-augmented generation » permet d’améliorer la q.ualité d’une réponse en ajouter des ressources complémentaires, voir Wikipedia.</text:p>
          </table:table-cell>
          <table:table-cell office:value-type="string">
            <text:p>https://www.uneiaparjour.fr/comparag/</text:p>
          </table:table-cell>
          <table:table-cell office:value-type="string">
            <text:p>FR / EU</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5/05/2026</text:p>
          </table:table-cell>
        </table:table-row>
        <table:table-row>
          <table:table-cell office:value-type="string">
            <text:p>Brik</text:p>
          </table:table-cell>
          <table:table-cell office:value-type="string">
            <text:p>Brik (https://brik.space/) génère des mini-applications interactives, entre mini-jeu et motion design, à partir d’une instruction.</text:p>
          </table:table-cell>
          <table:table-cell office:value-type="string">
            <text:p>https://www.uneiaparjour.fr/brik/</text:p>
          </table:table-cell>
          <table:table-cell office:value-type="string">
            <text:p>application</text:p>
          </table:table-cell>
          <table:table-cell office:value-type="string">
            <text:p>image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4/05/2026</text:p>
          </table:table-cell>
        </table:table-row>
        <table:table-row>
          <table:table-cell office:value-type="string">
            <text:p>Tokemon</text:p>
          </table:table-cell>
          <table:table-cell office:value-type="string">
            <text:p>Tokemon (https://tokemonlabs.com/ et documentation : https://github.com/leejustin/tokemon) présente 30 modèles de langage d’IA sous forme d’un Pokédex (voir sur Wikipedia) avec fiches de statistiques, types, chaînes d’évolution et combats simulés.L’ensemble est basé sur les codes du jeu Pokemon, Toekmon est un peu comme un Compar:IA Pokemon en pixel art.</text:p>
          </table:table-cell>
          <table:table-cell office:value-type="string">
            <text:p>https://www.uneiaparjour.fr/tokemon/</text:p>
          </table:table-cell>
          <table:table-cell office:value-type="string">
            <text:p>jeu vidéo</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3/05/2026</text:p>
          </table:table-cell>
        </table:table-row>
        <table:table-row>
          <table:table-cell office:value-type="string">
            <text:p>Linto Studio</text:p>
          </table:table-cell>
          <table:table-cell office:value-type="string">
            <text:p>LinTO Studio (https://studio.linto.ai/ et documentation : https://github.com/linto-ai) transcrit et génère des sous-titres à partir de fichiers audio ou vidéo.</text:p>
          </table:table-cell>
          <table:table-cell office:value-type="string">
            <text:p>https://www.uneiaparjour.fr/linto-studio/</text:p>
          </table:table-cell>
          <table:table-cell office:value-type="string">
            <text:p>FR / EU</text:p>
          </table:table-cell>
          <table:table-cell office:value-type="string">
            <text:p>open source</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2/05/2026</text:p>
          </table:table-cell>
        </table:table-row>
        <table:table-row>
          <table:table-cell office:value-type="string">
            <text:p>SciFig</text:p>
          </table:table-cell>
          <table:table-cell office:value-type="string">
            <text:p>SciFig (https://scifig.ai/) génère des figures scientifiques et des infographies à partir une instruction, un dessin ou un PDF ou une photo.</text:p>
          </table:table-cell>
          <table:table-cell office:value-type="string">
            <text:p>https://www.uneiaparjour.fr/scifig/</text:p>
          </table:table-cell>
          <table:table-cell office:value-type="string">
            <text:p>éducation</text:p>
          </table:table-cell>
          <table:table-cell office:value-type="string">
            <text:p>images</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11/05/2026</text:p>
          </table:table-cell>
        </table:table-row>
        <table:table-row>
          <table:table-cell office:value-type="string">
            <text:p>Open Maic</text:p>
          </table:table-cell>
          <table:table-cell office:value-type="string">
            <text:p>OpenMAIC (https://openmaic.io/, documentation : https://github.com/THU-MAIC/OpenMAIC, démo en ligne https://open.maic.chat/) génère des cours interactifs depuis une description de sujet ou un PDF importé, en orchestrant plusieurs agents IA.</text:p>
          </table:table-cell>
          <table:table-cell office:value-type="string">
            <text:p>https://www.uneiaparjour.fr/open-maic/</text:p>
          </table:table-cell>
          <table:table-cell office:value-type="string">
            <text:p>éducation</text:p>
          </table:table-cell>
          <table:table-cell office:value-type="string">
            <text:p>open sourc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10/05/2026</text:p>
          </table:table-cell>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