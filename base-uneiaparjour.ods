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WorkInProcess</text:p>
          </table:table-cell>
          <table:table-cell office:value-type="string">
            <text:p>WorkInProcess (https://workinprocess.app/) est un studio d’édition d’images en ligne dont les modèles IA s’exécutent entièrement dans le navigateur, sans envoi de fichiers vers un serveur.</text:p>
          </table:table-cell>
          <table:table-cell office:value-type="string">
            <text:p>https://www.uneiaparjour.fr/workinprocess/</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2/06/2026</text:p>
          </table:table-cell>
        </table:table-row>
        <table:table-row>
          <table:table-cell office:value-type="string">
            <text:p>DocsToAudio</text:p>
          </table:table-cell>
          <table:table-cell office:value-type="string">
            <text:p>DocsToAudio (https://docstoaudio.online/) convertit des fichiers pdf, epub, docx et txt en audio MP3 ou M4B avec 300 voix IA dans 50 langues disponibles (13 francophones dont 5 françaises)</text:p>
          </table:table-cell>
          <table:table-cell office:value-type="string">
            <text:p>https://www.uneiaparjour.fr/docstoaudio/</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01/06/2026</text:p>
          </table:table-cell>
        </table:table-row>
        <table:table-row>
          <table:table-cell office:value-type="string">
            <text:p>Explainpaper</text:p>
          </table:table-cell>
          <table:table-cell office:value-type="string">
            <text:p>Explainpaper (https://www.explainpaper.com/) explique les passages difficiles d’un fichier pdf.Orienté artciles de recherche mais fonctionne avec tout pdf.</text:p>
          </table:table-cell>
          <table:table-cell office:value-type="string">
            <text:p>https://www.uneiaparjour.fr/explainpaper/</text:p>
          </table:table-cell>
          <table:table-cell office:value-type="string">
            <text:p>documents</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5/2026</text:p>
          </table:table-cell>
        </table:table-row>
        <table:table-row>
          <table:table-cell office:value-type="string">
            <text:p>HappySeeds</text:p>
          </table:table-cell>
          <table:table-cell office:value-type="string">
            <text:p>HappySeeds (https://happyseeds.ai) génère des applications web à partir d’une instruction.</text:p>
          </table:table-cell>
          <table:table-cell office:value-type="string">
            <text:p>https://www.uneiaparjour.fr/happyseeds/</text:p>
          </table:table-cell>
          <table:table-cell office:value-type="string">
            <text:p>applic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1/05/2026</text:p>
          </table:table-cell>
        </table:table-row>
        <table:table-row>
          <table:table-cell office:value-type="string">
            <text:p>MeshGPT</text:p>
          </table:table-cell>
          <table:table-cell office:value-type="string">
            <text:p>MeshGPT (https://meshgpt.io/) génère des modèles 3D à partir d’une instruction texte ou d’une image.</text:p>
          </table:table-cell>
          <table:table-cell office:value-type="string">
            <text:p>https://www.uneiaparjour.fr/meshgpt/</text:p>
          </table:table-cell>
          <table:table-cell office:value-type="string">
            <text:p>images 3D</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5/2026</text:p>
          </table:table-cell>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