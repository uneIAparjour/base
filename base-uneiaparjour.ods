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Swishy</text:p>
          </table:table-cell>
          <table:table-cell office:value-type="string">
            <text:p>Swishy (https://www.swishy.ai/) génère des animations motion design (typographies ou objets animés) depuis une instruction en langage naturel.</text:p>
          </table:table-cell>
          <table:table-cell office:value-type="string">
            <text:p>https://www.uneiaparjour.fr/swishy/</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8/06/2026</text:p>
          </table:table-cell>
        </table:table-row>
        <table:table-row>
          <table:table-cell office:value-type="string">
            <text:p>Clarify AI</text:p>
          </table:table-cell>
          <table:table-cell office:value-type="string">
            <text:p>Clarify AI (https://www.clarify-ai.com/) découpe une problèmatique en un arbre de sous-questions hiérarchisées, avec recherche web et export en texte structuré.</text:p>
          </table:table-cell>
          <table:table-cell office:value-type="string">
            <text:p>https://www.uneiaparjour.fr/clarify-ai/</text:p>
          </table:table-cell>
          <table:table-cell office:value-type="string">
            <text:p>mindmap</text:p>
          </table:table-cell>
          <table:table-cell office:value-type="string">
            <text:p>recherche</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17/06/2026</text:p>
          </table:table-cell>
        </table:table-row>
        <table:table-row>
          <table:table-cell office:value-type="string">
            <text:p>Drafted</text:p>
          </table:table-cell>
          <table:table-cell office:value-type="string">
            <text:p>Drafted (https://www.drafted.ai/) génère des plans de maison à partir d’une liste de pièces, d’une forme de terrain et un style.</text:p>
          </table:table-cell>
          <table:table-cell office:value-type="string">
            <text:p>https://www.uneiaparjour.fr/drafted/</text:p>
          </table:table-cell>
          <table:table-cell office:value-type="string">
            <text:p>images</text:p>
          </table:table-cell>
          <table:table-cell office:value-type="string">
            <text:p>images 3D</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6/06/2026</text:p>
          </table:table-cell>
        </table:table-row>
        <table:table-row>
          <table:table-cell office:value-type="string">
            <text:p>ManualFig</text:p>
          </table:table-cell>
          <table:table-cell office:value-type="string">
            <text:p>ManualFig (https://manualfig.ai/) transforme une photo en notice de montage, mode d’emploi ou schéma d’utilisation à partir d’une image et d’une isntruction.</text:p>
          </table:table-cell>
          <table:table-cell office:value-type="string">
            <text:p>https://www.uneiaparjour.fr/manualfig/</text:p>
          </table:table-cell>
          <table:table-cell office:value-type="string">
            <text:p>images</text:p>
          </table:table-cell>
          <table:table-cell office:value-type="string">
            <text:p>tutorie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5/06/2026</text:p>
          </table:table-cell>
        </table:table-row>
        <table:table-row>
          <table:table-cell office:value-type="string">
            <text:p>Happycapy</text:p>
          </table:table-cell>
          <table:table-cell office:value-type="string">
            <text:p>Happycapy (https://happycapy.ai/) est un chatbot avec des agents IA pour exécuter dans le navigateur des tâches à la place de l’utilisateur.</text:p>
          </table:table-cell>
          <table:table-cell office:value-type="string">
            <text:p>https://www.uneiaparjour.fr/happycapy/</text:p>
          </table:table-cell>
          <table:table-cell office:value-type="string">
            <text:p>chatbot</text:p>
          </table:table-cell>
          <table:table-cell office:value-type="string">
            <text:p>documents</text:p>
          </table:table-cell>
          <table:table-cell office:value-type="string">
            <text:p>images</text:p>
          </table:table-cell>
          <table:table-cell office:value-type="string">
            <text:p>présentation</text:p>
          </table:table-cell>
          <table:table-cell office:value-type="string">
            <text:p>recherche</text:p>
          </table:table-cell>
          <table:table-cell office:value-type="string">
            <text:p/>
          </table:table-cell>
          <table:table-cell office:value-type="string">
            <text:p>14/06/2026</text:p>
          </table:table-cell>
        </table:table-row>
        <table:table-row>
          <table:table-cell office:value-type="string">
            <text:p>PDFFly PDF summarizer</text:p>
          </table:table-cell>
          <table:table-cell office:value-type="string">
            <text:p>PDFFly (https://pdffly.com/pdf-summarizer) génère un résumé structuré depuis un PDF importé et permet d’interroger le document via un chatbot.</text:p>
          </table:table-cell>
          <table:table-cell office:value-type="string">
            <text:p>https://www.uneiaparjour.fr/pdffly-pdf-summarizer/</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3/06/2026</text:p>
          </table:table-cell>
        </table:table-row>
        <table:table-row>
          <table:table-cell office:value-type="string">
            <text:p>Inkfox AI</text:p>
          </table:table-cell>
          <table:table-cell office:value-type="string">
            <text:p>Inkfox AI (https://inkfox.app/) génère des images et des vidéos par instruction, sans inscription nécessaire.</text:p>
          </table:table-cell>
          <table:table-cell office:value-type="string">
            <text:p>https://www.uneiaparjour.fr/inkfox-ai/</text:p>
          </table:table-cell>
          <table:table-cell office:value-type="string">
            <text:p>images</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2/06/2026</text:p>
          </table:table-cell>
        </table:table-row>
        <table:table-row>
          <table:table-cell office:value-type="string">
            <text:p>Lium</text:p>
          </table:table-cell>
          <table:table-cell office:value-type="string">
            <text:p>Lium (https://www.lium.ai/) connecte des sources de données complexes (bases, fichiers, API…) et répond en langage naturel par des analyses, scripts ou outils générés par IA.</text:p>
          </table:table-cell>
          <table:table-cell office:value-type="string">
            <text:p>https://www.uneiaparjour.fr/lium/</text:p>
          </table:table-cell>
          <table:table-cell office:value-type="string">
            <text:p>chatbot</text:p>
          </table:table-cell>
          <table:table-cell office:value-type="string">
            <text:p>donné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6/2026</text:p>
          </table:table-cell>
        </table:table-row>
        <table:table-row>
          <table:table-cell office:value-type="string">
            <text:p>ChordGen</text:p>
          </table:table-cell>
          <table:table-cell office:value-type="string">
            <text:p>ChordGen (https://www.chordgen.org/) génère des progressions d’accords à partir d’une instruction décrivant une ambiance ou un genre musical et un nombre d’accords.</text:p>
          </table:table-cell>
          <table:table-cell office:value-type="string">
            <text:p>https://www.uneiaparjour.fr/chordgen/</text:p>
          </table:table-cell>
          <table:table-cell office:value-type="string">
            <text:p>musiqu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0/06/2026</text:p>
          </table:table-cell>
        </table:table-row>
        <table:table-row>
          <table:table-cell office:value-type="string">
            <text:p>Open Paper</text:p>
          </table:table-cell>
          <table:table-cell office:value-type="string">
            <text:p>Open Paper (application : https://openpaper.ai/ et documentation : https://github.com/khoj-ai/openpaper) permet de lire, annoter et interroger des articles de recherche académique.</text:p>
          </table:table-cell>
          <table:table-cell office:value-type="string">
            <text:p>https://www.uneiaparjour.fr/open-paper/</text:p>
          </table:table-cell>
          <table:table-cell office:value-type="string">
            <text:p>documents</text:p>
          </table:table-cell>
          <table:table-cell office:value-type="string">
            <text:p>open source</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9/06/2026</text:p>
          </table:table-cell>
        </table:table-row>
        <table:table-row>
          <table:table-cell office:value-type="string">
            <text:p>InfoBlog</text:p>
          </table:table-cell>
          <table:table-cell office:value-type="string">
            <text:p>InfoBlog (https://useinfoblog.com/) transforme des instruction et/ou documents en présentations, carrousels ou infographies éditables.</text:p>
          </table:table-cell>
          <table:table-cell office:value-type="string">
            <text:p>https://www.uneiaparjour.fr/infoblog/</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08/06/2026</text:p>
          </table:table-cell>
        </table:table-row>
        <table:table-row>
          <table:table-cell office:value-type="string">
            <text:p>Is it Fake ?</text:p>
          </table:table-cell>
          <table:table-cell office:value-type="string">
            <text:p>Is it Fake ? (https://isitfake.app/) vérifie la crédibilité d’articles de presse via leur url.</text:p>
          </table:table-cell>
          <table:table-cell office:value-type="string">
            <text:p>https://www.uneiaparjour.fr/is-it-fake/</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6/2026</text:p>
          </table:table-cell>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