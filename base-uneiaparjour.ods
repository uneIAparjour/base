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Bubul</text:p>
          </table:table-cell>
          <table:table-cell office:value-type="string">
            <text:p>Bubul (https://bubul.app/) propose huit outils IA destinés aux enseignants et formateurs :</text:p>
          </table:table-cell>
          <table:table-cell office:value-type="string">
            <text:p>https://www.uneiaparjour.fr/bubul/</text:p>
          </table:table-cell>
          <table:table-cell office:value-type="string">
            <text:p>éducation</text:p>
          </table:table-cell>
          <table:table-cell office:value-type="string">
            <text:p>FR / EU</text:p>
          </table:table-cell>
          <table:table-cell office:value-type="string">
            <text:p>images</text:p>
          </table:table-cell>
          <table:table-cell office:value-type="string">
            <text:p>présentation</text:p>
          </table:table-cell>
          <table:table-cell office:value-type="string">
            <text:p/>
          </table:table-cell>
          <table:table-cell office:value-type="string">
            <text:p/>
          </table:table-cell>
          <table:table-cell office:value-type="string">
            <text:p>06/07/2026</text:p>
          </table:table-cell>
        </table:table-row>
        <table:table-row>
          <table:table-cell office:value-type="string">
            <text:p>Briefed</text:p>
          </table:table-cell>
          <table:table-cell office:value-type="string">
            <text:p>Briefed (https://briefednewsletter.com/) génère une newsletter personnalisée par IA à partir d’une instruction.</text:p>
          </table:table-cell>
          <table:table-cell office:value-type="string">
            <text:p>https://www.uneiaparjour.fr/briefed/</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7/2026</text:p>
          </table:table-cell>
        </table:table-row>
        <table:table-row>
          <table:table-cell office:value-type="string">
            <text:p>Acti</text:p>
          </table:table-cell>
          <table:table-cell office:value-type="string">
            <text:p>Acti (https://openacti.com) transforme le clavier du téléphone en assistant IA : instruction en langage naturel, exécution d’actions dans les autres applications, bibliothèque de plus de 150 outils intégrés.</text:p>
          </table:table-cell>
          <table:table-cell office:value-type="string">
            <text:p>https://www.uneiaparjour.fr/acti/</text:p>
          </table:table-cell>
          <table:table-cell office:value-type="string">
            <text:p>automatisation</text:p>
          </table:table-cell>
          <table:table-cell office:value-type="string">
            <text:p>chatbot</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03/07/2026</text:p>
          </table:table-cell>
        </table:table-row>
        <table:table-row>
          <table:table-cell office:value-type="string">
            <text:p>LearnKata</text:p>
          </table:table-cell>
          <table:table-cell office:value-type="string">
            <text:p>LearnKata (https://learnkata.ai/) transforme une instruction ou des documents importés en supports d’apprentissage : résumés, quiz, flashcards et cartes mentales.</text:p>
          </table:table-cell>
          <table:table-cell office:value-type="string">
            <text:p>https://www.uneiaparjour.fr/learnkata/</text:p>
          </table:table-cell>
          <table:table-cell office:value-type="string">
            <text:p>éducation</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4/07/2026</text:p>
          </table:table-cell>
        </table:table-row>
        <table:table-row>
          <table:table-cell office:value-type="string">
            <text:p>Boogu Image</text:p>
          </table:table-cell>
          <table:table-cell office:value-type="string">
            <text:p>Boogu Image (http://demo-base.boogu.org et documentation : https://github.com/boogu-project/Boogu-Image) génère et édite des images à partir d’une instruction texte, avec rendu de texte intégré en français-anglais et en chinois.</text:p>
          </table:table-cell>
          <table:table-cell office:value-type="string">
            <text:p>https://www.uneiaparjour.fr/boogu-image/</text:p>
          </table:table-cell>
          <table:table-cell office:value-type="string">
            <text:p>images</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7/2026</text:p>
          </table:table-cell>
        </table:table-row>
        <table:table-row>
          <table:table-cell office:value-type="string">
            <text:p>Lumo 2.0</text:p>
          </table:table-cell>
          <table:table-cell office:value-type="string">
            <text:p>Lumo 2.0 (https://lumo.proton.me/) est la nouvelle version de Lumo, le chatbot de Proton qui génère du texte, analyse et génère des images, effectue une recherche web sourcée, et conserve une mémoire contrôlée par l’utilisateur, le tout chiffré de bout en bout.</text:p>
          </table:table-cell>
          <table:table-cell office:value-type="string">
            <text:p>https://www.uneiaparjour.fr/lumo-2-0/</text:p>
          </table:table-cell>
          <table:table-cell office:value-type="string">
            <text:p>chatbot</text:p>
          </table:table-cell>
          <table:table-cell office:value-type="string">
            <text:p>documents</text:p>
          </table:table-cell>
          <table:table-cell office:value-type="string">
            <text:p>FR / EU</text:p>
          </table:table-cell>
          <table:table-cell office:value-type="string">
            <text:p>images</text:p>
          </table:table-cell>
          <table:table-cell office:value-type="string">
            <text:p>sans compte</text:p>
          </table:table-cell>
          <table:table-cell office:value-type="string">
            <text:p>texte</text:p>
          </table:table-cell>
          <table:table-cell office:value-type="string">
            <text:p>01/07/2026</text:p>
          </table:table-cell>
        </table:table-row>
        <table:table-row>
          <table:table-cell office:value-type="string">
            <text:p>Pluno</text:p>
          </table:table-cell>
          <table:table-cell office:value-type="string">
            <text:p>Pluno (https://pluno.ai/browser) est une extension de navigateur qui exécute des tâches dircetement dans les pages web à partir d’une instruction.</text:p>
          </table:table-cell>
          <table:table-cell office:value-type="string">
            <text:p>https://www.uneiaparjour.fr/pluno/</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6/2026</text:p>
          </table:table-cell>
        </table:table-row>
        <table:table-row>
          <table:table-cell office:value-type="string">
            <text:p>Music0 AI</text:p>
          </table:table-cell>
          <table:table-cell office:value-type="string">
            <text:p>Music0 AI (https://music0.org/) génère des morceaux de musique et des clips vidéo depuis une instruction.</text:p>
          </table:table-cell>
          <table:table-cell office:value-type="string">
            <text:p>https://www.uneiaparjour.fr/music0-ai/</text:p>
          </table:table-cell>
          <table:table-cell office:value-type="string">
            <text:p>musique</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6/2026</text:p>
          </table:table-cell>
        </table:table-row>
        <table:table-row>
          <table:table-cell office:value-type="string">
            <text:p>Lolaby</text:p>
          </table:table-cell>
          <table:table-cell office:value-type="string">
            <text:p>Lolaby (https://huggingface.co/spaces/build-small-hackathon/lolaby et documentation : https://huggingface.co/build-small-hackathon/lolaby-llama-3b) génère des berceuses personnalisées à partir d’une image (dessin ou photo), du prénom, de l’âge et des centres d’intérêt d’un enfant.</text:p>
          </table:table-cell>
          <table:table-cell office:value-type="string">
            <text:p>https://www.uneiaparjour.fr/lolaby/</text:p>
          </table:table-cell>
          <table:table-cell office:value-type="string">
            <text:p>langues</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texte</text:p>
          </table:table-cell>
          <table:table-cell office:value-type="string">
            <text:p>voix</text:p>
          </table:table-cell>
          <table:table-cell office:value-type="string">
            <text:p>27/06/2026</text:p>
          </table:table-cell>
        </table:table-row>
        <table:table-row>
          <table:table-cell office:value-type="string">
            <text:p>Mistral OCR 4</text:p>
          </table:table-cell>
          <table:table-cell office:value-type="string">
            <text:p>Mistral OCR 4 (https://console.mistral.ai/build/document-ai/ocr-playground et documentation : https://docs.mistral.ai/models/model-cards/ocr-4-0) extrait et structure le contenu de documents.</text:p>
          </table:table-cell>
          <table:table-cell office:value-type="string">
            <text:p>https://www.uneiaparjour.fr/mistral-ocr-4/</text:p>
          </table:table-cell>
          <table:table-cell office:value-type="string">
            <text:p>documen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6/2026</text:p>
          </table:table-cell>
        </table:table-row>
        <table:table-row>
          <table:table-cell office:value-type="string">
            <text:p>ImagiNPrompt</text:p>
          </table:table-cell>
          <table:table-cell office:value-type="string">
            <text:p>ImagiNPrompt (https://imaginprompt.com/) génère des instructions depuis une image importée ou un texte libre et génère également des images.</text:p>
          </table:table-cell>
          <table:table-cell office:value-type="string">
            <text:p>https://www.uneiaparjour.fr/imaginprompt/</text:p>
          </table:table-cell>
          <table:table-cell office:value-type="string">
            <text:p>images</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6/2026</text:p>
          </table:table-cell>
        </table:table-row>
        <table:table-row>
          <table:table-cell office:value-type="string">
            <text:p>Floor Plan Maker</text:p>
          </table:table-cell>
          <table:table-cell office:value-type="string">
            <text:p>Floor Plan Maker (https://floorplanmaker.ai/) génère des plans, change le style des intérieurs et des façades depuis une photo importée, et convertit des plans 2D en modèles 3D exportables.</text:p>
          </table:table-cell>
          <table:table-cell office:value-type="string">
            <text:p>https://www.uneiaparjour.fr/floor-plan-maker/</text:p>
          </table:table-cell>
          <table:table-cell office:value-type="string">
            <text:p>images</text:p>
          </table:table-cell>
          <table:table-cell office:value-type="string">
            <text:p>images 3D</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5/06/2026</text:p>
          </table:table-cell>
        </table:table-row>
        <table:table-row>
          <table:table-cell office:value-type="string">
            <text:p>JustVibe</text:p>
          </table:table-cell>
          <table:table-cell office:value-type="string">
            <text:p>JustVibe (https://justvibe.com/) génère des applications web interactives à partir d’une instruction.</text:p>
          </table:table-cell>
          <table:table-cell office:value-type="string">
            <text:p>https://www.uneiaparjour.fr/justvibe/</text:p>
          </table:table-cell>
          <table:table-cell office:value-type="string">
            <text:p>application</text:p>
          </table:table-cell>
          <table:table-cell office:value-type="string">
            <text:p>chatbot</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24/06/2026</text:p>
          </table:table-cell>
        </table:table-row>
        <table:table-row>
          <table:table-cell office:value-type="string">
            <text:p>Loopa</text:p>
          </table:table-cell>
          <table:table-cell office:value-type="string">
            <text:p>Loopa (https://www.loopa.im) est une plateforme d’agents IA qui exécute des tâches de recherche, création, analyse et automatisation.</text:p>
          </table:table-cell>
          <table:table-cell office:value-type="string">
            <text:p>https://www.uneiaparjour.fr/loopa/</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6/2026</text:p>
          </table:table-cell>
        </table:table-row>
        <table:table-row>
          <table:table-cell office:value-type="string">
            <text:p>MakeInfographic AI</text:p>
          </table:table-cell>
          <table:table-cell office:value-type="string">
            <text:p>MakeInfographic AI (https://www.makeinfographic.ai/) génère des infographies depuis une instruction.</text:p>
          </table:table-cell>
          <table:table-cell office:value-type="string">
            <text:p>https://www.uneiaparjour.fr/makeinfographic-ai/</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6/2026</text:p>
          </table:table-cell>
        </table:table-row>
        <table:table-row>
          <table:table-cell office:value-type="string">
            <text:p>Socrati</text:p>
          </table:table-cell>
          <table:table-cell office:value-type="string">
            <text:p>Socrati (https://socrati.app/) transforme une instruction, un sujet, un PDF, une vidéo YouTube ou une photo en un cours interactif avec leçons, quiz, flashcards (et audio en version payante).</text:p>
          </table:table-cell>
          <table:table-cell office:value-type="string">
            <text:p>https://www.uneiaparjour.fr/socrati/</text:p>
          </table:table-cell>
          <table:table-cell office:value-type="string">
            <text:p>chatbot</text:p>
          </table:table-cell>
          <table:table-cell office:value-type="string">
            <text:p>documents</text:p>
          </table:table-cell>
          <table:table-cell office:value-type="string">
            <text:p>éducation</text:p>
          </table:table-cell>
          <table:table-cell office:value-type="string">
            <text:p>quiz et flashcards</text:p>
          </table:table-cell>
          <table:table-cell office:value-type="string">
            <text:p>texte</text:p>
          </table:table-cell>
          <table:table-cell office:value-type="string">
            <text:p/>
          </table:table-cell>
          <table:table-cell office:value-type="string">
            <text:p>20/06/2026</text:p>
          </table:table-cell>
        </table:table-row>
        <table:table-row>
          <table:table-cell office:value-type="string">
            <text:p>Veritas Source</text:p>
          </table:table-cell>
          <table:table-cell office:value-type="string">
            <text:p>Veritas Source (https://veritas-source.com/) analyse une URL, un texte ou une image pour en évaluer la source : biais politique, propriétaire, financement, antécédents éditoriaux, et signes de génération par IA.</text:p>
          </table:table-cell>
          <table:table-cell office:value-type="string">
            <text:p>https://www.uneiaparjour.fr/veritas-source/</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9/06/2026</text:p>
          </table:table-cell>
        </table:table-row>
        <table:table-row>
          <table:table-cell office:value-type="string">
            <text:p>Swishy</text:p>
          </table:table-cell>
          <table:table-cell office:value-type="string">
            <text:p>Swishy (https://www.swishy.ai/) génère des animations motion design (typographies ou objets animés) depuis une instruction en langage naturel.</text:p>
          </table:table-cell>
          <table:table-cell office:value-type="string">
            <text:p>https://www.uneiaparjour.fr/swishy/</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6/2026</text:p>
          </table:table-cell>
        </table:table-row>
        <table:table-row>
          <table:table-cell office:value-type="string">
            <text:p>Clarify AI</text:p>
          </table:table-cell>
          <table:table-cell office:value-type="string">
            <text:p>Clarify AI (https://www.clarify-ai.com/) découpe une problèmatique en un arbre de sous-questions hiérarchisées, avec recherche web et export en texte structuré.</text:p>
          </table:table-cell>
          <table:table-cell office:value-type="string">
            <text:p>https://www.uneiaparjour.fr/clarify-ai/</text:p>
          </table:table-cell>
          <table:table-cell office:value-type="string">
            <text:p>mindmap</text:p>
          </table:table-cell>
          <table:table-cell office:value-type="string">
            <text:p>recherche</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17/06/2026</text:p>
          </table:table-cell>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