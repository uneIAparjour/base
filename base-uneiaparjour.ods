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Pluno</text:p>
          </table:table-cell>
          <table:table-cell office:value-type="string">
            <text:p>Pluno (https://pluno.ai/browser) est une extension de navigateur qui exécute des tâches dircetement dans les pages web à partir d’une instruction.</text:p>
          </table:table-cell>
          <table:table-cell office:value-type="string">
            <text:p>https://www.uneiaparjour.fr/pluno/</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6/2026</text:p>
          </table:table-cell>
        </table:table-row>
        <table:table-row>
          <table:table-cell office:value-type="string">
            <text:p>Music0 AI</text:p>
          </table:table-cell>
          <table:table-cell office:value-type="string">
            <text:p>Music0 AI (https://music0.org/) génère des morceaux de musique et des clips vidéo depuis une instruction.</text:p>
          </table:table-cell>
          <table:table-cell office:value-type="string">
            <text:p>https://www.uneiaparjour.fr/music0-ai/</text:p>
          </table:table-cell>
          <table:table-cell office:value-type="string">
            <text:p>musique</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6/2026</text:p>
          </table:table-cell>
        </table:table-row>
        <table:table-row>
          <table:table-cell office:value-type="string">
            <text:p>Lolaby</text:p>
          </table:table-cell>
          <table:table-cell office:value-type="string">
            <text:p>Lolaby (https://huggingface.co/spaces/build-small-hackathon/lolaby et documentation : https://huggingface.co/build-small-hackathon/lolaby-llama-3b) génère des berceuses personnalisées à partir d’une image (dessin ou photo), du prénom, de l’âge et des centres d’intérêt d’un enfant.</text:p>
          </table:table-cell>
          <table:table-cell office:value-type="string">
            <text:p>https://www.uneiaparjour.fr/lolaby/</text:p>
          </table:table-cell>
          <table:table-cell office:value-type="string">
            <text:p>langues</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texte</text:p>
          </table:table-cell>
          <table:table-cell office:value-type="string">
            <text:p>voix</text:p>
          </table:table-cell>
          <table:table-cell office:value-type="string">
            <text:p>27/06/2026</text:p>
          </table:table-cell>
        </table:table-row>
        <table:table-row>
          <table:table-cell office:value-type="string">
            <text:p>Mistral OCR 4</text:p>
          </table:table-cell>
          <table:table-cell office:value-type="string">
            <text:p>Mistral OCR 4 (https://console.mistral.ai/build/document-ai/ocr-playground et documentation : https://docs.mistral.ai/models/model-cards/ocr-4-0) extrait et structure le contenu de documents.</text:p>
          </table:table-cell>
          <table:table-cell office:value-type="string">
            <text:p>https://www.uneiaparjour.fr/mistral-ocr-4/</text:p>
          </table:table-cell>
          <table:table-cell office:value-type="string">
            <text:p>documen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6/2026</text:p>
          </table:table-cell>
        </table:table-row>
        <table:table-row>
          <table:table-cell office:value-type="string">
            <text:p>ImagiNPrompt</text:p>
          </table:table-cell>
          <table:table-cell office:value-type="string">
            <text:p>ImagiNPrompt (https://imaginprompt.com/) génère des instructions depuis une image importée ou un texte libre et génère également des images.</text:p>
          </table:table-cell>
          <table:table-cell office:value-type="string">
            <text:p>https://www.uneiaparjour.fr/imaginprompt/</text:p>
          </table:table-cell>
          <table:table-cell office:value-type="string">
            <text:p>images</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6/2026</text:p>
          </table:table-cell>
        </table:table-row>
        <table:table-row>
          <table:table-cell office:value-type="string">
            <text:p>Floor Plan Maker</text:p>
          </table:table-cell>
          <table:table-cell office:value-type="string">
            <text:p>Floor Plan Maker (https://floorplanmaker.ai/) génère des plans, change le style des intérieurs et des façades depuis une photo importée, et convertit des plans 2D en modèles 3D exportables.</text:p>
          </table:table-cell>
          <table:table-cell office:value-type="string">
            <text:p>https://www.uneiaparjour.fr/floor-plan-maker/</text:p>
          </table:table-cell>
          <table:table-cell office:value-type="string">
            <text:p>images</text:p>
          </table:table-cell>
          <table:table-cell office:value-type="string">
            <text:p>images 3D</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5/06/2026</text:p>
          </table:table-cell>
        </table:table-row>
        <table:table-row>
          <table:table-cell office:value-type="string">
            <text:p>JustVibe</text:p>
          </table:table-cell>
          <table:table-cell office:value-type="string">
            <text:p>JustVibe (https://justvibe.com/) génère des applications web interactives à partir d’une instruction.</text:p>
          </table:table-cell>
          <table:table-cell office:value-type="string">
            <text:p>https://www.uneiaparjour.fr/justvibe/</text:p>
          </table:table-cell>
          <table:table-cell office:value-type="string">
            <text:p>application</text:p>
          </table:table-cell>
          <table:table-cell office:value-type="string">
            <text:p>chatbot</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24/06/2026</text:p>
          </table:table-cell>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