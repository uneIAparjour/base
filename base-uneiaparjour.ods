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Saveto</text:p>
          </table:table-cell>
          <table:table-cell office:value-type="string">
            <text:p>Saveto AI (https://saveto.ai/) regroupe plusieurs outils pour transcrire, résumer, transformer vidéos, fichiers audio et documents mais aussi générer podcast, infographies ouflashcards.</text:p>
          </table:table-cell>
          <table:table-cell office:value-type="string">
            <text:p>https://www.uneiaparjour.fr/saveto/</text:p>
          </table:table-cell>
          <table:table-cell office:value-type="string">
            <text:p>documents</text:p>
          </table:table-cell>
          <table:table-cell office:value-type="string">
            <text:p>infographie</text:p>
          </table:table-cell>
          <table:table-cell office:value-type="string">
            <text:p>mindmap</text:p>
          </table:table-cell>
          <table:table-cell office:value-type="string">
            <text:p>présentation</text:p>
          </table:table-cell>
          <table:table-cell office:value-type="string">
            <text:p>quiz et flashcards</text:p>
          </table:table-cell>
          <table:table-cell office:value-type="string">
            <text:p>usage illimité</text:p>
          </table:table-cell>
          <table:table-cell office:value-type="string">
            <text:p>18/05/2026</text:p>
          </table:table-cell>
        </table:table-row>
        <table:table-row>
          <table:table-cell office:value-type="string">
            <text:p>Nodalist</text:p>
          </table:table-cell>
          <table:table-cell office:value-type="string">
            <text:p>Nodalist AI (https://nodalist.ai/) construit une carte basée sur la réflexion autour d’un sujet donné où chaque idée devient un nœud et où plusieurs modèles de langage peuvent débattre en temps réel sur un sujet de la carte.</text:p>
          </table:table-cell>
          <table:table-cell office:value-type="string">
            <text:p>https://www.uneiaparjour.fr/nodalist/</text:p>
          </table:table-cell>
          <table:table-cell office:value-type="string">
            <text:p>LLM</text:p>
          </table:table-cell>
          <table:table-cell office:value-type="string">
            <text:p>mindma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7/05/2026</text:p>
          </table:table-cell>
        </table:table-row>
        <table:table-row>
          <table:table-cell office:value-type="string">
            <text:p>Hum2song</text:p>
          </table:table-cell>
          <table:table-cell office:value-type="string">
            <text:p>Hum2Song (https://www.carlostoxtli.com/hum2song/, documentation : https://github.com/toxtli/hum2song) génère un accompagnement musical à partir d’une mélodie fredonnée ou chantée.</text:p>
          </table:table-cell>
          <table:table-cell office:value-type="string">
            <text:p>https://www.uneiaparjour.fr/hum2song/</text:p>
          </table:table-cell>
          <table:table-cell office:value-type="string">
            <text:p>musique</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16/05/2026</text:p>
          </table:table-cell>
        </table:table-row>
        <table:table-row>
          <table:table-cell office:value-type="string">
            <text:p>CompaRAG</text:p>
          </table:table-cell>
          <table:table-cell office:value-type="string">
            <text:p>CompaRAG (https://comparag.vercel.app/, description : https://www.linkedin.com/pulse/au-coeur-du-premier-comparateur-doutils-rag-fran%C3%A7ais-la-sarazin-phd-rhdje/ et documentation : https://github.com/ArthurSrz/CompaRAG/) compare des outils RAG à l’aveugle à partir d’une instruction et de documents soumis par l’utilisateur.Le RAG pour « retrieval-augmented generation » permet d’améliorer la q.ualité d’une réponse en ajouter des ressources complémentaires, voir Wikipedia.</text:p>
          </table:table-cell>
          <table:table-cell office:value-type="string">
            <text:p>https://www.uneiaparjour.fr/comparag/</text:p>
          </table:table-cell>
          <table:table-cell office:value-type="string">
            <text:p>FR / EU</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5/05/2026</text:p>
          </table:table-cell>
        </table:table-row>
        <table:table-row>
          <table:table-cell office:value-type="string">
            <text:p>Brik</text:p>
          </table:table-cell>
          <table:table-cell office:value-type="string">
            <text:p>Brik (https://brik.space/) génère des mini-applications interactives, entre mini-jeu et motion design, à partir d’une instruction.</text:p>
          </table:table-cell>
          <table:table-cell office:value-type="string">
            <text:p>https://www.uneiaparjour.fr/brik/</text:p>
          </table:table-cell>
          <table:table-cell office:value-type="string">
            <text:p>application</text:p>
          </table:table-cell>
          <table:table-cell office:value-type="string">
            <text:p>images</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14/05/2026</text:p>
          </table:table-cell>
        </table:table-row>
        <table:table-row>
          <table:table-cell office:value-type="string">
            <text:p>Tokemon</text:p>
          </table:table-cell>
          <table:table-cell office:value-type="string">
            <text:p>Tokemon (https://tokemonlabs.com/ et documentation : https://github.com/leejustin/tokemon) présente 30 modèles de langage d’IA sous forme d’un Pokédex (voir sur Wikipedia) avec fiches de statistiques, types, chaînes d’évolution et combats simulés.L’ensemble est basé sur les codes du jeu Pokemon, Toekmon est un peu comme un Compar:IA Pokemon en pixel art.</text:p>
          </table:table-cell>
          <table:table-cell office:value-type="string">
            <text:p>https://www.uneiaparjour.fr/tokemon/</text:p>
          </table:table-cell>
          <table:table-cell office:value-type="string">
            <text:p>jeu vidéo</text:p>
          </table:table-cell>
          <table:table-cell office:value-type="string">
            <text:p>LLM</text:p>
          </table:table-cell>
          <table:table-cell office:value-type="string">
            <text:p>open source</text:p>
          </table:table-cell>
          <table:table-cell office:value-type="string">
            <text:p>sans compte</text:p>
          </table:table-cell>
          <table:table-cell office:value-type="string">
            <text:p>usage illimité</text:p>
          </table:table-cell>
          <table:table-cell office:value-type="string">
            <text:p/>
          </table:table-cell>
          <table:table-cell office:value-type="string">
            <text:p>13/05/2026</text:p>
          </table:table-cell>
        </table:table-row>
        <table:table-row>
          <table:table-cell office:value-type="string">
            <text:p>Linto Studio</text:p>
          </table:table-cell>
          <table:table-cell office:value-type="string">
            <text:p>LinTO Studio (https://studio.linto.ai/ et documentation : https://github.com/linto-ai) transcrit et génère des sous-titres à partir de fichiers audio ou vidéo.</text:p>
          </table:table-cell>
          <table:table-cell office:value-type="string">
            <text:p>https://www.uneiaparjour.fr/linto-studio/</text:p>
          </table:table-cell>
          <table:table-cell office:value-type="string">
            <text:p>FR / EU</text:p>
          </table:table-cell>
          <table:table-cell office:value-type="string">
            <text:p>open source</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12/05/2026</text:p>
          </table:table-cell>
        </table:table-row>
        <table:table-row>
          <table:table-cell office:value-type="string">
            <text:p>SciFig</text:p>
          </table:table-cell>
          <table:table-cell office:value-type="string">
            <text:p>SciFig (https://scifig.ai/) génère des figures scientifiques et des infographies à partir une instruction, un dessin ou un PDF ou une photo.</text:p>
          </table:table-cell>
          <table:table-cell office:value-type="string">
            <text:p>https://www.uneiaparjour.fr/scifig/</text:p>
          </table:table-cell>
          <table:table-cell office:value-type="string">
            <text:p>éducation</text:p>
          </table:table-cell>
          <table:table-cell office:value-type="string">
            <text:p>images</text:p>
          </table:table-cell>
          <table:table-cell office:value-type="string">
            <text:p>infographie</text:p>
          </table:table-cell>
          <table:table-cell office:value-type="string">
            <text:p/>
          </table:table-cell>
          <table:table-cell office:value-type="string">
            <text:p/>
          </table:table-cell>
          <table:table-cell office:value-type="string">
            <text:p/>
          </table:table-cell>
          <table:table-cell office:value-type="string">
            <text:p>11/05/2026</text:p>
          </table:table-cell>
        </table:table-row>
        <table:table-row>
          <table:table-cell office:value-type="string">
            <text:p>Open Maic</text:p>
          </table:table-cell>
          <table:table-cell office:value-type="string">
            <text:p>OpenMAIC (https://openmaic.io/, documentation : https://github.com/THU-MAIC/OpenMAIC, démo en ligne https://open.maic.chat/) génère des cours interactifs depuis une description de sujet ou un PDF importé, en orchestrant plusieurs agents IA.</text:p>
          </table:table-cell>
          <table:table-cell office:value-type="string">
            <text:p>https://www.uneiaparjour.fr/open-maic/</text:p>
          </table:table-cell>
          <table:table-cell office:value-type="string">
            <text:p>éducation</text:p>
          </table:table-cell>
          <table:table-cell office:value-type="string">
            <text:p>open sourc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10/05/2026</text:p>
          </table:table-cell>
        </table:table-row>
        <table:table-row>
          <table:table-cell office:value-type="string">
            <text:p>Friday</text:p>
          </table:table-cell>
          <table:table-cell office:value-type="string">
            <text:p>Friday (https://hellofriday.ai pour la version à installer et application en ligne : https://app.hellofriday.ai. Documentation : https://github.com/friday-platform/friday-studio) construit depuis des instructions dans un chatbot puis exécute des automatisations en mettent en place agents IA qui peuvent se lancer régulièrement.</text:p>
          </table:table-cell>
          <table:table-cell office:value-type="string">
            <text:p>https://www.uneiaparjour.fr/friday/</text:p>
          </table:table-cell>
          <table:table-cell office:value-type="string">
            <text:p>automatis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9/05/2026</text:p>
          </table:table-cell>
        </table:table-row>
        <table:table-row>
          <table:table-cell office:value-type="string">
            <text:p>Pomelli</text:p>
          </table:table-cell>
          <table:table-cell office:value-type="string">
            <text:p>Pomelli (https://labs.google.com/u/0/pomelli/) est un outil expérimental de Google Labs spécialisé dans la création de campagnes de communications à partir d’un site web.</text:p>
          </table:table-cell>
          <table:table-cell office:value-type="string">
            <text:p>https://www.uneiaparjour.fr/pomell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8/05/2026</text:p>
          </table:table-cell>
        </table:table-row>
        <table:table-row>
          <table:table-cell office:value-type="string">
            <text:p>Presenton</text:p>
          </table:table-cell>
          <table:table-cell office:value-type="string">
            <text:p>Presenton (https://presenton.ai/ — documentation : https://github.com/presenton/presenton) génère des présentations depuis une instruction ou un document importé.</text:p>
          </table:table-cell>
          <table:table-cell office:value-type="string">
            <text:p>https://www.uneiaparjour.fr/presenton/</text:p>
          </table:table-cell>
          <table:table-cell office:value-type="string">
            <text:p>open source</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7/05/2026</text:p>
          </table:table-cell>
        </table:table-row>
        <table:table-row>
          <table:table-cell office:value-type="string">
            <text:p>Knowly</text:p>
          </table:table-cell>
          <table:table-cell office:value-type="string">
            <text:p>Knowly (https://goknowly.ai/) transforme des contenus sauvegardés ou un sujet saisi directement en parcours d’apprentissage : articles, PDF, vidéos et pages web sont organisés automatiquement en thèmes dans une bibliothèque et/ou organisés en « flows ».</text:p>
          </table:table-cell>
          <table:table-cell office:value-type="string">
            <text:p>https://www.uneiaparjour.fr/knowly/</text:p>
          </table:table-cell>
          <table:table-cell office:value-type="string">
            <text:p>documents</text:p>
          </table:table-cell>
          <table:table-cell office:value-type="string">
            <text:p>éducation</text:p>
          </table:table-cell>
          <table:table-cell office:value-type="string">
            <text:p>recherche</text:p>
          </table:table-cell>
          <table:table-cell office:value-type="string">
            <text:p/>
          </table:table-cell>
          <table:table-cell office:value-type="string">
            <text:p/>
          </table:table-cell>
          <table:table-cell office:value-type="string">
            <text:p/>
          </table:table-cell>
          <table:table-cell office:value-type="string">
            <text:p>06/05/2026</text:p>
          </table:table-cell>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