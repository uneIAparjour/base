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MemeCam</text:p>
          </table:table-cell>
          <table:table-cell office:value-type="string">
            <text:p>MemeCam (https://www.memecam.io) génère un mème à partir d’une photo importée ou prise via la caméra.</text:p>
          </table:table-cell>
          <table:table-cell office:value-type="string">
            <text:p>https://www.uneiaparjour.fr/memecam/</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7/2026</text:p>
          </table:table-cell>
        </table:table-row>
        <table:table-row>
          <table:table-cell office:value-type="string">
            <text:p>Fenzo</text:p>
          </table:table-cell>
          <table:table-cell office:value-type="string">
            <text:p>Fenzo (https://fenzo.ai/) génère un cours interactif structuré à partir d’une instruction ou de documents importés.</text:p>
          </table:table-cell>
          <table:table-cell office:value-type="string">
            <text:p>https://www.uneiaparjour.fr/fenzo/</text:p>
          </table:table-cell>
          <table:table-cell office:value-type="string">
            <text:p>éduc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7/2026</text:p>
          </table:table-cell>
        </table:table-row>
        <table:table-row>
          <table:table-cell office:value-type="string">
            <text:p>Convly Image-to-Prompt Generator</text:p>
          </table:table-cell>
          <table:table-cell office:value-type="string">
            <text:p>Convly Image-to-Prompt Generator (https://convly.ai/image-to-prompt/) génère une instruction à partir d’une image importée.</text:p>
          </table:table-cell>
          <table:table-cell office:value-type="string">
            <text:p>https://www.uneiaparjour.fr/convly-image-to-prompt-generator/</text:p>
          </table:table-cell>
          <table:table-cell office:value-type="string">
            <text:p>imag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4/07/2026</text:p>
          </table:table-cell>
        </table:table-row>
        <table:table-row>
          <table:table-cell office:value-type="string">
            <text:p>Vidmud AI Photo Editor</text:p>
          </table:table-cell>
          <table:table-cell office:value-type="string">
            <text:p>Vidmud AI Photo Editor (https://www.vidmud.com/ai-photo-editor-online.html) modifie une photo à partir d’une instruction textuelle.</text:p>
          </table:table-cell>
          <table:table-cell office:value-type="string">
            <text:p>https://www.uneiaparjour.fr/vidmud-ai-photo-editor/</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13/07/2026</text:p>
          </table:table-cell>
        </table:table-row>
        <table:table-row>
          <table:table-cell office:value-type="string">
            <text:p>Video Transcription AI</text:p>
          </table:table-cell>
          <table:table-cell office:value-type="string">
            <text:p>Video Transcription AI (https://videotranscription.ai/) transcrit automatiquement des vidéos Youtube, Tiktok ou Instagram, des fichiers vidéos, audios ou texte avec résumé, chatbot et carte mentale.</text:p>
          </table:table-cell>
          <table:table-cell office:value-type="string">
            <text:p>https://www.uneiaparjour.fr/video-transcription-ai/</text:p>
          </table:table-cell>
          <table:table-cell office:value-type="string">
            <text:p>chatbot</text:p>
          </table:table-cell>
          <table:table-cell office:value-type="string">
            <text:p>documents</text:p>
          </table:table-cell>
          <table:table-cell office:value-type="string">
            <text:p>mindmap</text:p>
          </table:table-cell>
          <table:table-cell office:value-type="string">
            <text:p>sans compte</text:p>
          </table:table-cell>
          <table:table-cell office:value-type="string">
            <text:p>usage illimité</text:p>
          </table:table-cell>
          <table:table-cell office:value-type="string">
            <text:p>youtube</text:p>
          </table:table-cell>
          <table:table-cell office:value-type="string">
            <text:p>12/07/2026</text:p>
          </table:table-cell>
        </table:table-row>
        <table:table-row>
          <table:table-cell office:value-type="string">
            <text:p>Image to 3D AI</text:p>
          </table:table-cell>
          <table:table-cell office:value-type="string">
            <text:p>Image to 3D AI (https://image-to-3d.ai/) génère des modèles 3D à partir d’une image ou d’une instruction texte.</text:p>
          </table:table-cell>
          <table:table-cell office:value-type="string">
            <text:p>https://www.uneiaparjour.fr/image-to-3d-ai/</text:p>
          </table:table-cell>
          <table:table-cell office:value-type="string">
            <text:p>images 3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7/2026</text:p>
          </table:table-cell>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