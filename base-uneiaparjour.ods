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ChordGen</text:p>
          </table:table-cell>
          <table:table-cell office:value-type="string">
            <text:p>ChordGen (https://www.chordgen.org/) génère des progressions d’accords à partir d’une instruction décrivant une ambiance ou un genre musical et un nombre d’accords.</text:p>
          </table:table-cell>
          <table:table-cell office:value-type="string">
            <text:p>https://www.uneiaparjour.fr/chordgen/</text:p>
          </table:table-cell>
          <table:table-cell office:value-type="string">
            <text:p>musiqu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0/06/2026</text:p>
          </table:table-cell>
        </table:table-row>
        <table:table-row>
          <table:table-cell office:value-type="string">
            <text:p>Open Paper</text:p>
          </table:table-cell>
          <table:table-cell office:value-type="string">
            <text:p>Open Paper (application : https://openpaper.ai/ et documentation : https://github.com/khoj-ai/openpaper) permet de lire, annoter et interroger des articles de recherche académique.</text:p>
          </table:table-cell>
          <table:table-cell office:value-type="string">
            <text:p>https://www.uneiaparjour.fr/open-paper/</text:p>
          </table:table-cell>
          <table:table-cell office:value-type="string">
            <text:p>documents</text:p>
          </table:table-cell>
          <table:table-cell office:value-type="string">
            <text:p>open source</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9/06/2026</text:p>
          </table:table-cell>
        </table:table-row>
        <table:table-row>
          <table:table-cell office:value-type="string">
            <text:p>InfoBlog</text:p>
          </table:table-cell>
          <table:table-cell office:value-type="string">
            <text:p>InfoBlog (https://useinfoblog.com/) transforme des instruction et/ou documents en présentations, carrousels ou infographies éditables.</text:p>
          </table:table-cell>
          <table:table-cell office:value-type="string">
            <text:p>https://www.uneiaparjour.fr/infoblog/</text:p>
          </table:table-cell>
          <table:table-cell office:value-type="string">
            <text:p>images</text:p>
          </table:table-cell>
          <table:table-cell office:value-type="string">
            <text:p>infographi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08/06/2026</text:p>
          </table:table-cell>
        </table:table-row>
        <table:table-row>
          <table:table-cell office:value-type="string">
            <text:p>Is it Fake ?</text:p>
          </table:table-cell>
          <table:table-cell office:value-type="string">
            <text:p>Is it Fake ? (https://isitfake.app/) vérifie la crédibilité d’articles de presse via leur url.</text:p>
          </table:table-cell>
          <table:table-cell office:value-type="string">
            <text:p>https://www.uneiaparjour.fr/is-it-fake/</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6/2026</text:p>
          </table:table-cell>
        </table:table-row>
        <table:table-row>
          <table:table-cell office:value-type="string">
            <text:p>Arena</text:p>
          </table:table-cell>
          <table:table-cell office:value-type="string">
            <text:p>Arena (https://arena.ai/) est la version commerciale de Chatbot Arena, relancée en janvier 2026 sous un nouveau nom et une nouvelle URL, avec des fonctionnalités étendues. Le site est également accessible sur HuggingFace (https://huggingface.co/lmarena-ai).</text:p>
          </table:table-cell>
          <table:table-cell office:value-type="string">
            <text:p>https://www.uneiaparjour.fr/arena/</text:p>
          </table:table-cell>
          <table:table-cell office:value-type="string">
            <text:p>chatbot</text:p>
          </table:table-cell>
          <table:table-cell office:value-type="string">
            <text:p>documents</text:p>
          </table:table-cell>
          <table:table-cell office:value-type="string">
            <text:p>images</text:p>
          </table:table-cell>
          <table:table-cell office:value-type="string">
            <text:p>LLM</text:p>
          </table:table-cell>
          <table:table-cell office:value-type="string">
            <text:p>texte</text:p>
          </table:table-cell>
          <table:table-cell office:value-type="string">
            <text:p>usage illimité</text:p>
          </table:table-cell>
          <table:table-cell office:value-type="string">
            <text:p>06/06/2026</text:p>
          </table:table-cell>
        </table:table-row>
        <table:table-row>
          <table:table-cell office:value-type="string">
            <text:p>PDF to Lesson</text:p>
          </table:table-cell>
          <table:table-cell office:value-type="string">
            <text:p>PDF to Lesson (https://www.pdftolesson.com/ — documentation : https://github.com/Nutlope/pdf-to-interactive-lesson) transforme un document PDF en cours interactif structuré en modules.</text:p>
          </table:table-cell>
          <table:table-cell office:value-type="string">
            <text:p>https://www.uneiaparjour.fr/pdf-to-lesson/</text:p>
          </table:table-cell>
          <table:table-cell office:value-type="string">
            <text:p>documents</text:p>
          </table:table-cell>
          <table:table-cell office:value-type="string">
            <text:p>éduc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05/06/2026</text:p>
          </table:table-cell>
        </table:table-row>
        <table:table-row>
          <table:table-cell office:value-type="string">
            <text:p>MAI Playground</text:p>
          </table:table-cell>
          <table:table-cell office:value-type="string">
            <text:p>MAI Playground (https://playground.microsoft.ai/) donne accès aux modèles IA de Microsoft : génération d’images, transcription audio, synthèse vocale et conversation multimodale.</text:p>
          </table:table-cell>
          <table:table-cell office:value-type="string">
            <text:p>https://www.uneiaparjour.fr/mai-playground/</text:p>
          </table:table-cell>
          <table:table-cell office:value-type="string">
            <text:p>images</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04/06/2026</text:p>
          </table:table-cell>
        </table:table-row>
        <table:table-row>
          <table:table-cell office:value-type="string">
            <text:p>Overline</text:p>
          </table:table-cell>
          <table:table-cell office:value-type="string">
            <text:p>Overline (https://overline.live/) est une extension Chrome qui ajoute des sous-titres en temps réel et une traduction en direct en superposition sur n’importe quelle vidéo du navigateur, sans fichier de sous-titres et sans changer d’onglet.</text:p>
          </table:table-cell>
          <table:table-cell office:value-type="string">
            <text:p>https://www.uneiaparjour.fr/overline/</text:p>
          </table:table-cell>
          <table:table-cell office:value-type="string">
            <text:p>langu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6/2026</text:p>
          </table:table-cell>
        </table:table-row>
        <table:table-row>
          <table:table-cell office:value-type="string">
            <text:p>WorkInProcess</text:p>
          </table:table-cell>
          <table:table-cell office:value-type="string">
            <text:p>WorkInProcess (https://workinprocess.app/) est un studio d’édition d’images en ligne dont les modèles IA s’exécutent entièrement dans le navigateur, sans envoi de fichiers vers un serveur.</text:p>
          </table:table-cell>
          <table:table-cell office:value-type="string">
            <text:p>https://www.uneiaparjour.fr/workinprocess/</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2/06/2026</text:p>
          </table:table-cell>
        </table:table-row>
        <table:table-row>
          <table:table-cell office:value-type="string">
            <text:p>DocsToAudio</text:p>
          </table:table-cell>
          <table:table-cell office:value-type="string">
            <text:p>DocsToAudio (https://docstoaudio.online/) convertit des fichiers pdf, epub, docx et txt en audio MP3 ou M4B avec 300 voix IA dans 50 langues disponibles (13 francophones dont 5 françaises)</text:p>
          </table:table-cell>
          <table:table-cell office:value-type="string">
            <text:p>https://www.uneiaparjour.fr/docstoaudio/</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01/06/2026</text:p>
          </table:table-cell>
        </table:table-row>
        <table:table-row>
          <table:table-cell office:value-type="string">
            <text:p>Explainpaper</text:p>
          </table:table-cell>
          <table:table-cell office:value-type="string">
            <text:p>Explainpaper (https://www.explainpaper.com/) explique les passages difficiles d’un fichier pdf.Orienté artciles de recherche mais fonctionne avec tout pdf.</text:p>
          </table:table-cell>
          <table:table-cell office:value-type="string">
            <text:p>https://www.uneiaparjour.fr/explainpaper/</text:p>
          </table:table-cell>
          <table:table-cell office:value-type="string">
            <text:p>documents</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5/2026</text:p>
          </table:table-cell>
        </table:table-row>
        <table:table-row>
          <table:table-cell office:value-type="string">
            <text:p>HappySeeds</text:p>
          </table:table-cell>
          <table:table-cell office:value-type="string">
            <text:p>HappySeeds (https://happyseeds.ai) génère des applications web à partir d’une instruction.</text:p>
          </table:table-cell>
          <table:table-cell office:value-type="string">
            <text:p>https://www.uneiaparjour.fr/happyseeds/</text:p>
          </table:table-cell>
          <table:table-cell office:value-type="string">
            <text:p>applic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1/05/2026</text:p>
          </table:table-cell>
        </table:table-row>
        <table:table-row>
          <table:table-cell office:value-type="string">
            <text:p>MeshGPT</text:p>
          </table:table-cell>
          <table:table-cell office:value-type="string">
            <text:p>MeshGPT (https://meshgpt.io/) génère des modèles 3D à partir d’une instruction texte ou d’une image.</text:p>
          </table:table-cell>
          <table:table-cell office:value-type="string">
            <text:p>https://www.uneiaparjour.fr/meshgpt/</text:p>
          </table:table-cell>
          <table:table-cell office:value-type="string">
            <text:p>images 3D</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5/2026</text:p>
          </table:table-cell>
        </table:table-row>
        <table:table-row>
          <table:table-cell office:value-type="string">
            <text:p>MindChat World</text:p>
          </table:table-cell>
          <table:table-cell office:value-type="string">
            <text:p>MindChat World (https://mindchat.world/fr/) permet de converser par écrit avec des personnages historiques simulés dans un chatbot : écrivains, philosophes et scientifiques.</text:p>
          </table:table-cell>
          <table:table-cell office:value-type="string">
            <text:p>https://www.uneiaparjour.fr/mindchat-world/</text:p>
          </table:table-cell>
          <table:table-cell office:value-type="string">
            <text:p>chatbot</text:p>
          </table:table-cell>
          <table:table-cell office:value-type="string">
            <text:p>FR / EU</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5/2026</text:p>
          </table:table-cell>
        </table:table-row>
        <table:table-row>
          <table:table-cell office:value-type="string">
            <text:p>Ecosia</text:p>
          </table:table-cell>
          <table:table-cell office:value-type="string">
            <text:p>Ecosia (https://www.ecosia.org) est un moteur de recherche, basé sur Bing, Google et Qwant, à but non lucratif dont les profits issus de la publicité, financent des projets de reforestation et d’energie renouvelables.Intègre deux fonctionnalités IA : des résumés générés (AI Overviews) et un mode conversationnel (Chat IA).</text:p>
          </table:table-cell>
          <table:table-cell office:value-type="string">
            <text:p>https://www.uneiaparjour.fr/ecosia/</text:p>
          </table:table-cell>
          <table:table-cell office:value-type="string">
            <text:p>FR / EU</text:p>
          </table:table-cell>
          <table:table-cell office:value-type="string">
            <text:p>recherch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7/05/2026</text:p>
          </table:table-cell>
        </table:table-row>
        <table:table-row>
          <table:table-cell office:value-type="string">
            <text:p>Stable Audio 3</text:p>
          </table:table-cell>
          <table:table-cell office:value-type="string">
            <text:p>Stable Audio 3 (https://huggingface.co/collections/stabilityai/stable-audio-3) est la nouvelle version du modèle de génération de musique de la famille Stable Audio déjà vue par ici. Open source pour 3 de ses 4 variantes, génère des morceaux de musique instrumentale et des effets sonores depuis une instruction, avec des sons / musiques pouvant être ajoutés comme repères.</text:p>
          </table:table-cell>
          <table:table-cell office:value-type="string">
            <text:p>https://www.uneiaparjour.fr/stable-audio-3/</text:p>
          </table:table-cell>
          <table:table-cell office:value-type="string">
            <text:p>musique</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5/2026</text:p>
          </table:table-cell>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