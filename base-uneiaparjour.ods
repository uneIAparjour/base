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Longscribe</text:p>
          </table:table-cell>
          <table:table-cell office:value-type="string">
            <text:p>Longscribe (https://longscribe.com) transcrit des vidéos et enregistrements longs (YouTube, Vimeo, TikTok, Instagram, Facebook, Twitch, X, Dailymotion, SoundCloud ou des fichiers audio/vidéo importés).</text:p>
          </table:table-cell>
          <table:table-cell office:value-type="string">
            <text:p>https://www.uneiaparjour.fr/longscribe/</text:p>
          </table:table-cell>
          <table:table-cell office:value-type="string">
            <text:p>Non classé</text:p>
          </table:table-cell>
          <table:table-cell office:value-type="string">
            <text:p>sans compte</text:p>
          </table:table-cell>
          <table:table-cell office:value-type="string">
            <text:p>texte</text:p>
          </table:table-cell>
          <table:table-cell office:value-type="string">
            <text:p>vidéo</text:p>
          </table:table-cell>
          <table:table-cell office:value-type="string">
            <text:p>voix</text:p>
          </table:table-cell>
          <table:table-cell office:value-type="string">
            <text:p>youtube</text:p>
          </table:table-cell>
          <table:table-cell office:value-type="string">
            <text:p>20/07/2026</text:p>
          </table:table-cell>
        </table:table-row>
        <table:table-row>
          <table:table-cell office:value-type="string">
            <text:p>Deck</text:p>
          </table:table-cell>
          <table:table-cell office:value-type="string">
            <text:p>Deck (https://www.hellodeck.ai/) est un assistant IA joignable par une adresse e-mail dédiée, capable d’automatiser des tâches, de suivre des fils de discussion et d’organiser le travail par projets.</text:p>
          </table:table-cell>
          <table:table-cell office:value-type="string">
            <text:p>https://www.uneiaparjour.fr/deck/</text:p>
          </table:table-cell>
          <table:table-cell office:value-type="string">
            <text:p>automatisation</text:p>
          </table:table-cell>
          <table:table-cell office:value-type="string">
            <text:p>chatbot</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21/07/2026</text:p>
          </table:table-cell>
        </table:table-row>
        <table:table-row>
          <table:table-cell office:value-type="string">
            <text:p>Aye</text:p>
          </table:table-cell>
          <table:table-cell office:value-type="string">
            <text:p>Aye (https://okaapps.com/product/6760281977) est un navigateur web basé sur Chromium avec assistant IA intégré, capable d’analyser une page et de planifier et exécuter des actions.</text:p>
          </table:table-cell>
          <table:table-cell office:value-type="string">
            <text:p>https://www.uneiaparjour.fr/aye/</text:p>
          </table:table-cell>
          <table:table-cell office:value-type="string">
            <text:p>automatisation</text:p>
          </table:table-cell>
          <table:table-cell office:value-type="string">
            <text:p>chatbot</text:p>
          </table:table-cell>
          <table:table-cell office:value-type="string">
            <text:p>navigateur</text:p>
          </table:table-cell>
          <table:table-cell office:value-type="string">
            <text:p>sans compte</text:p>
          </table:table-cell>
          <table:table-cell office:value-type="string">
            <text:p>usage illimité</text:p>
          </table:table-cell>
          <table:table-cell office:value-type="string">
            <text:p/>
          </table:table-cell>
          <table:table-cell office:value-type="string">
            <text:p>19/07/2026</text:p>
          </table:table-cell>
        </table:table-row>
        <table:table-row>
          <table:table-cell office:value-type="string">
            <text:p>MixTranslate</text:p>
          </table:table-cell>
          <table:table-cell office:value-type="string">
            <text:p>MixTranslate (https://mixtranslate.com/) envoie une même instruction de traduction à des modèles de langage en parallèle et sélectionne automatiquement le résultat le plus adapté au ton et au contexte.</text:p>
          </table:table-cell>
          <table:table-cell office:value-type="string">
            <text:p>https://www.uneiaparjour.fr/mixtranslat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7/2026</text:p>
          </table:table-cell>
        </table:table-row>
        <table:table-row>
          <table:table-cell office:value-type="string">
            <text:p>Moodboard Creator</text:p>
          </table:table-cell>
          <table:table-cell office:value-type="string">
            <text:p>Moodboard Creator (https://www.moodboardcreator.dev) génère un tableau d’inspirations à partir d’une courte description.</text:p>
          </table:table-cell>
          <table:table-cell office:value-type="string">
            <text:p>https://www.uneiaparjour.fr/moodboard-creator/</text:p>
          </table:table-cell>
          <table:table-cell office:value-type="string">
            <text:p>présentation</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7/07/2026</text:p>
          </table:table-cell>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