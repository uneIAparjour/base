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MindChat World</text:p>
          </table:table-cell>
          <table:table-cell office:value-type="string">
            <text:p>MindChat World (https://mindchat.world/fr/) permet de converser par écrit avec des personnages historiques simulés dans un chatbot : écrivains, philosophes et scientifiques.</text:p>
          </table:table-cell>
          <table:table-cell office:value-type="string">
            <text:p>https://www.uneiaparjour.fr/mindchat-world/</text:p>
          </table:table-cell>
          <table:table-cell office:value-type="string">
            <text:p>chatbot</text:p>
          </table:table-cell>
          <table:table-cell office:value-type="string">
            <text:p>FR / E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5/2026</text:p>
          </table:table-cell>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